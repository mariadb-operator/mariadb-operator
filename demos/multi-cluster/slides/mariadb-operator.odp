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C29000005673BA44EE4B3682AF4.png" manifest:media-type="image/png"/>
  <manifest:file-entry manifest:full-path="Pictures/100000010000010000000100862132B4217EF112.png" manifest:media-type="image/png"/>
  <manifest:file-entry manifest:full-path="Pictures/10000001000001000000010008128A6F9F5B0610.png" manifest:media-type="image/png"/>
  <manifest:file-entry manifest:full-path="Pictures/1000000100000190000001044860CFBFF0406581.png" manifest:media-type="image/png"/>
  <manifest:file-entry manifest:full-path="Pictures/100000010000010000000100463E6744CE35361C.png" manifest:media-type="image/png"/>
  <manifest:file-entry manifest:full-path="Pictures/1000000100000100000001009267FAE5BE3445AB.png" manifest:media-type="image/png"/>
  <manifest:file-entry manifest:full-path="Pictures/100000010000010000000100A61CB24CF1AD9A63.png" manifest:media-type="image/png"/>
  <manifest:file-entry manifest:full-path="Pictures/10000001000001000000010007F2C46B649B4731.png" manifest:media-type="image/png"/>
  <manifest:file-entry manifest:full-path="Pictures/10000001000005F00000039847BBCBFBD0BA70AC.png" manifest:media-type="image/png"/>
  <manifest:file-entry manifest:full-path="Pictures/10000000000001F4000001F4311B7FC6D13F3553.png" manifest:media-type="image/png"/>
  <manifest:file-entry manifest:full-path="Pictures/100000010000010000000100F9B4A047F1FE0CCD.png" manifest:media-type="image/png"/>
  <manifest:file-entry manifest:full-path="Pictures/100000010000010000000100299B6E8F3AAF9124.png" manifest:media-type="image/png"/>
  <manifest:file-entry manifest:full-path="Pictures/100000010000010000000100554DD106E739B3A2.png" manifest:media-type="image/png"/>
  <manifest:file-entry manifest:full-path="Pictures/100000010000019000000190603268EAEA4351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variable"/>
    <style:font-face style:name="Cambria2" svg:font-family="Cambria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8fafc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d9488" svg:stroke-opacity="18%" draw:fill="solid" draw:fill-color="#0d9488" draw:opacity="1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14b8a6" svg:stroke-opacity="12%" draw:fill="solid" draw:fill-color="#14b8a6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6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99f6e4" draw:fill="solid" draw:fill-color="#0d948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3cm" svg:stroke-color="#99f6e4" draw:fill="solid" draw:fill-color="#16203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35cm" svg:stroke-color="#0d1b2a" draw:fill="solid" draw:fill-color="#0d1b2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d9488" svg:stroke-opacity="22%" draw:fill="solid" draw:fill-color="#0d9488" draw:opacity="2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2%" loext:shadow-blur="0.282cm"/>
    </style:style>
    <style:style style:name="gr2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d9488" draw:fill="solid" draw:fill-color="#0d948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99f6e4" draw:fill="solid" draw:fill-color="#f0fdf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d9488" svg:stroke-opacity="14%" draw:fill="solid" draw:fill-color="#0d9488" draw:opacity="14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14b8a6" svg:stroke-opacity="10%" draw:fill="solid" draw:fill-color="#14b8a6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35cm" svg:stroke-color="#0d9488" svg:stroke-opacity="12%" draw:fill="solid" draw:fill-color="#0d9488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18cm" svg:stroke-color="#0d9488" draw:fill="solid" draw:fill-color="#162032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2%" loext:shadow-blur="0.282cm"/>
    </style:style>
    <style:style style:name="gr4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51" style:family="graphic" style:parent-style-name="standard">
      <style:graphic-properties draw:stroke="solid" svg:stroke-width="0.053cm" svg:stroke-color="#0d9488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0d9488" svg:stroke-opacity="16%" draw:fill="solid" draw:fill-color="#0d9488" draw:opacity="16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d948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standard">
      <style:graphic-properties draw:stroke="solid" svg:stroke-width="0.035cm" svg:stroke-color="#374151" draw:fill="solid" draw:fill-color="#11182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ef4444" draw:fill="solid" draw:fill-color="#ef444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35cm" svg:stroke-color="#f59e0b" draw:fill="solid" draw:fill-color="#f59e0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22c55e" draw:fill="solid" draw:fill-color="#22c5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04cm" fo:padding-bottom="0.004cm" fo:padding-left="0.004cm" fo:padding-right="0.004cm" fo:wrap-option="wrap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7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7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0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7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1" style:family="graphic" style:parent-style-name="standard">
      <style:graphic-properties draw:stroke="solid" svg:stroke-width="0.035cm" svg:stroke-color="#0d9488" svg:stroke-opacity="8%" draw:fill="solid" draw:fill-color="#0d9488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solid" svg:stroke-width="0.035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d9488" draw:opacity="18%"/>
      <style:paragraph-properties fo:text-align="start"/>
      <style:text-properties fo:font-size="18pt"/>
    </style:style>
    <style:style style:name="P2" style:family="paragraph">
      <loext:graphic-properties draw:fill="solid" draw:fill-color="#14b8a6" draw:opacity="12%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1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0d9488"/>
      <style:paragraph-properties fo:text-align="start"/>
      <style:text-properties fo:font-size="18pt"/>
    </style:style>
    <style:style style:name="P9" style:family="paragraph">
      <loext:graphic-properties draw:fill="solid" draw:fill-color="#162032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solid" draw:fill-color="#0d1b2a"/>
      <style:paragraph-properties fo:text-align="start"/>
      <style:text-properties fo:font-size="18pt"/>
    </style:style>
    <style:style style:name="P15" style:family="paragraph">
      <loext:graphic-properties draw:fill="solid" draw:fill-color="#0d9488" draw:opacity="22%"/>
      <style:paragraph-properties fo:text-align="start"/>
      <style:text-properties fo:font-size="18pt"/>
    </style:style>
    <style:style style:name="P16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loext:graphic-properties draw:fill="solid" draw:fill-color="#f0fdfa"/>
      <style:paragraph-properties fo:text-align="start"/>
      <style:text-properties fo:font-size="18pt"/>
    </style:style>
    <style:style style:name="P21" style:family="paragraph">
      <loext:graphic-properties draw:fill="solid" draw:fill-color="#0d9488" draw:opacity="14%"/>
      <style:paragraph-properties fo:text-align="start"/>
      <style:text-properties fo:font-size="18pt"/>
    </style:style>
    <style:style style:name="P22" style:family="paragraph">
      <loext:graphic-properties draw:fill="solid" draw:fill-color="#14b8a6" draw:opacity="10%"/>
      <style:paragraph-properties fo:text-align="start"/>
      <style:text-properties fo:font-size="18pt"/>
    </style:style>
    <style:style style:name="P23" style:family="paragraph">
      <loext:graphic-properties draw:fill="solid" draw:fill-color="#0d9488" draw:opacity="12%"/>
      <style:paragraph-properties fo:text-align="start"/>
      <style:text-properties fo:font-size="18pt"/>
    </style:style>
    <style:style style:name="P24" style:family="paragraph">
      <loext:graphic-properties draw:fill="solid" draw:fill-color="#0d9488" draw:opacity="16%"/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6" style:family="paragraph">
      <loext:graphic-properties draw:fill="solid" draw:fill-color="#111827"/>
      <style:paragraph-properties fo:text-align="start"/>
      <style:text-properties fo:font-size="18pt"/>
    </style:style>
    <style:style style:name="P27" style:family="paragraph">
      <loext:graphic-properties draw:fill="solid" draw:fill-color="#ef4444"/>
      <style:paragraph-properties fo:text-align="start"/>
      <style:text-properties fo:font-size="18pt"/>
    </style:style>
    <style:style style:name="P28" style:family="paragraph">
      <loext:graphic-properties draw:fill="solid" draw:fill-color="#f59e0b"/>
      <style:paragraph-properties fo:text-align="start"/>
      <style:text-properties fo:font-size="18pt"/>
    </style:style>
    <style:style style:name="P29" style:family="paragraph">
      <loext:graphic-properties draw:fill="solid" draw:fill-color="#22c55e"/>
      <style:paragraph-properties fo:text-align="start"/>
      <style:text-properties fo:font-size="18pt"/>
    </style:style>
    <style:style style:name="P30" style:family="paragraph">
      <style:paragraph-properties fo:text-align="start" style:writing-mode="lr-tb"/>
      <style:text-properties fo:font-size="18pt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0d9488" draw:opacity="8%"/>
      <style:paragraph-properties fo:text-align="start"/>
      <style:text-properties fo:font-size="18pt"/>
    </style:style>
    <style:style style:name="T1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9pt" fo:letter-spacing="0.071cm" fo:language="en" fo:country="US" fo:font-style="normal" style:text-underline-style="none" fo:font-weight="normal" fo:background-color="transparent" style:font-name-asian="Calibri4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38pt" fo:letter-spacing="normal" fo:language="en" fo:country="US" fo:font-style="normal" style:text-underline-style="none" fo:font-weight="bold" fo:background-color="transparent" style:font-name-asian="Cambria2" style:font-size-asian="38pt" style:font-style-asian="normal" style:font-weight-asian="bold" style:font-name-complex="Cambria" style:font-size-complex="38pt" style:font-style-complex="normal" style:font-weight-complex="bold"/>
    </style:style>
    <style:style style:name="T3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fo:background-color="transparent" style:font-name-asian="Calibri4" style:font-size-asian="22pt" style:font-style-asian="normal" style:font-weight-asian="normal" style:font-name-complex="Calibri2" style:font-size-complex="22pt" style:font-style-complex="normal" style:font-weight-complex="normal"/>
    </style:style>
    <style:style style:name="T4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bold" fo:background-color="transparent" style:font-name-asian="Cambria2" style:font-size-asian="18pt" style:font-style-asian="normal" style:font-weight-asian="bold" style:font-name-complex="Cambria" style:font-size-complex="18pt" style:font-style-complex="normal" style:font-weight-complex="bold"/>
    </style:style>
    <style:style style:name="T8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9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0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alibri4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11" style:family="text">
      <style:text-properties fo:font-variant="normal" fo:text-transform="none" fo:color="#1e293b" loext:opacity="100%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2" style:font-size-asian="30pt" style:font-style-asian="normal" style:font-weight-asian="bold" style:font-name-complex="Cambria" style:font-size-complex="30pt" style:font-style-complex="normal" style:font-weight-complex="bold"/>
    </style:style>
    <style:style style:name="T12" style:family="text">
      <style:text-properties fo:font-variant="normal" fo:text-transform="none" fo:color="#0d9488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13" style:family="text">
      <style:text-properties fo:font-variant="normal" fo:text-transform="none" fo:color="#1e293b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14" style:family="text">
      <style:text-properties fo:font-variant="normal" fo:text-transform="none" fo:color="#1e293b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15" style:family="text">
      <style:text-properties fo:font-variant="normal" fo:text-transform="none" fo:color="#64748b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6" style:family="text">
      <style:text-properties fo:font-variant="normal" fo:text-transform="none" fo:color="#1e293b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18" style:family="text">
      <style:text-properties fo:font-variant="normal" fo:text-transform="none" fo:color="#1e293b" loext:opacity="100%" style:text-line-through-style="none" style:text-line-through-type="none" style:text-position="0% 100%" style:font-name="Cambria" fo:font-size="12pt" fo:letter-spacing="normal" fo:language="en" fo:country="US" fo:font-style="italic" style:text-underline-style="none" fo:font-weight="normal" fo:background-color="transparent" style:font-name-asian="Cambria2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32pt" fo:letter-spacing="normal" fo:language="en" fo:country="US" fo:font-style="normal" style:text-underline-style="none" fo:font-weight="bold" fo:background-color="transparent" style:font-name-asian="Cambria2" style:font-size-asian="32pt" style:font-style-asian="normal" style:font-weight-asian="bold" style:font-name-complex="Cambria" style:font-size-complex="32pt" style:font-style-complex="normal" style:font-weight-complex="bold"/>
    </style:style>
    <style:style style:name="T20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2" style:font-size-asian="30pt" style:font-style-asian="normal" style:font-weight-asian="bold" style:font-name-complex="Cambria" style:font-size-complex="30pt" style:font-style-complex="normal" style:font-weight-complex="bold"/>
    </style:style>
    <style:style style:name="T22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4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24" style:family="text">
      <style:text-properties fo:font-variant="normal" fo:text-transform="none" fo:color="#99f6e4" loext:opacity="100%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bold" fo:background-color="transparent" style:font-name-asian="Cambria2" style:font-size-asian="16pt" style:font-style-asian="normal" style:font-weight-asian="bold" style:font-name-complex="Cambria" style:font-size-complex="16pt" style:font-style-complex="normal" style:font-weight-complex="bold"/>
    </style:style>
    <style:style style:name="T25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4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26" style:family="text">
      <style:text-properties fo:font-variant="normal" fo:text-transform="none" fo:color="#0d1b2a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40pt" fo:letter-spacing="normal" fo:language="en" fo:country="US" fo:font-style="normal" style:text-underline-style="none" fo:font-weight="bold" fo:background-color="transparent" style:font-name-asian="Cambria2" style:font-size-asian="40pt" style:font-style-asian="normal" style:font-weight-asian="bold" style:font-name-complex="Cambria" style:font-size-complex="40pt" style:font-style-complex="normal" style:font-weight-complex="bold"/>
    </style:style>
    <style:style style:name="T28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fo:background-color="transparent" style:font-name-asian="Calibri4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T29" style:family="text">
      <style:text-properties fo:font-variant="normal" fo:text-transform="none" fo:color="#0d1b2a" loext:opacity="100%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bold" fo:background-color="transparent" style:font-name-asian="Calibri4" style:font-size-asian="8pt" style:font-style-asian="normal" style:font-weight-asian="bold" style:font-name-complex="Calibri2" style:font-size-complex="8pt" style:font-style-complex="normal" style:font-weight-complex="bold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24pt" fo:letter-spacing="normal" fo:language="en" fo:country="US" fo:font-style="normal" style:text-underline-style="none" fo:font-weight="bold" fo:background-color="transparent" style:font-name-asian="Cambria2" style:font-size-asian="24pt" style:font-style-asian="normal" style:font-weight-asian="bold" style:font-name-complex="Cambria" style:font-size-complex="24pt" style:font-style-complex="normal" style:font-weight-complex="bold"/>
    </style:style>
    <style:style style:name="T31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4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32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4" style:family="text">
      <style:text-properties fo:font-variant="normal" fo:text-transform="none" fo:color="#4b6173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5" style:family="text">
      <style:text-properties fo:font-variant="normal" fo:text-transform="none" fo:color="#5eead4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6" style:family="text">
      <style:text-properties fo:font-variant="normal" fo:text-transform="none" fo:color="#64748b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7" style:family="text">
      <style:text-properties fo:font-variant="normal" fo:text-transform="none" fo:color="#e2e8f0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8" style:family="text">
      <style:text-properties fo:font-variant="normal" fo:text-transform="none" fo:color="#fb923c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9" style:family="text">
      <style:text-properties fo:font-variant="normal" fo:text-transform="none" fo:color="#374151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0" style:family="text">
      <style:text-properties fo:font-variant="normal" fo:text-transform="none" fo:color="#a78bfa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1" style:family="text">
      <style:text-properties fo:font-variant="normal" fo:text-transform="none" fo:color="#93c5fd" loext:opacity="100%" style:text-line-through-style="none" style:text-line-through-type="none" style:text-position="0% 100%" style:font-name="Courier New" fo:font-size="7.5pt" fo:letter-spacing="normal" fo:language="en" fo:country="US" fo:font-style="normal" style:text-underline-style="none" fo:font-weight="normal" fo:background-color="transparent" style:font-name-asian="Courier New2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26pt" fo:letter-spacing="normal" fo:language="en" fo:country="US" fo:font-style="normal" style:text-underline-style="none" fo:font-weight="bold" fo:background-color="transparent" style:font-name-asian="Cambria2" style:font-size-asian="26pt" style:font-style-asian="normal" style:font-weight-asian="bold" style:font-name-complex="Cambria" style:font-size-complex="26pt" style:font-style-complex="normal" style:font-weight-complex="bold"/>
    </style:style>
    <style:style style:name="T43" style:family="text">
      <style:text-properties fo:font-variant="normal" fo:text-transform="none" fo:color="#ffffff" loext:opacity="100%" style:text-line-through-style="none" style:text-line-through-type="none" style:text-position="0% 100%" style:font-name="Cambria" fo:font-size="44pt" fo:letter-spacing="normal" fo:language="en" fo:country="US" fo:font-style="normal" style:text-underline-style="none" fo:font-weight="bold" fo:background-color="transparent" style:font-name-asian="Cambria2" style:font-size-asian="44pt" style:font-style-asian="normal" style:font-weight-asian="bold" style:font-name-complex="Cambria" style:font-size-complex="44pt" style:font-style-complex="normal" style:font-weight-complex="bold"/>
    </style:style>
    <style:style style:name="T44" style:family="text">
      <style:text-properties fo:font-variant="normal" fo:text-transform="none" fo:color="#99f6e4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fo:background-color="transparent" style:font-name-asian="Calibri4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45" style:family="text">
      <style:text-properties fo:font-variant="normal" fo:text-transform="none" fo:color="#5eead4" loext:opacity="100%" style:text-line-through-style="none" style:text-line-through-type="none" style:text-position="0% 100%" style:font-name="Courier New" fo:font-size="9pt" fo:letter-spacing="normal" fo:language="en" fo:country="US" fo:font-style="normal" style:text-underline-style="none" fo:font-weight="normal" fo:background-color="transparent" style:font-name-asian="Courier New2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6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4" style:font-size-asian="10pt" style:font-style-asian="normal" style:font-weight-asian="normal" style:font-name-complex="Calibri2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9f6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e29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eea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Shape 0" draw:style-name="gr1" draw:text-style-name="P1" draw:layer="layout" svg:width="12.699cm" svg:height="12.699cm" svg:x="18.288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" draw:text-style-name="P2" draw:layer="layout" svg:width="7.619cm" svg:height="7.619cm" svg:x="-2.032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3" draw:text-style-name="P3" draw:layer="layout" svg:width="1.396cm" svg:height="1.396cm" svg:x="1.143cm" svg:y="0.711cm">
          <draw:image xlink:href="Pictures/100000010000010000000100862132B4217EF112.png" xlink:type="simple" xlink:show="embed" xlink:actuate="onLoad" draw:mime-type="image/png">
            <text:p/>
          </draw:image>
          <svg:desc>preencoded.png</svg:desc>
        </draw:frame>
        <draw:custom-shape draw:name="Text 2" draw:style-name="gr4" draw:text-style-name="P5" draw:layer="layout" svg:width="21.589cm" svg:height="0.888cm" svg:x="2.794cm" svg:y="0.711cm">
          <text:p text:style-name="P4"><text:span text:style-name="T1">BUILDEVCON <text:s/>· <text:s/></text:span><text:span text:style-name="T1">MARIADB / MYSQL </text:span><text:span text:style-name="T1">ON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7" draw:layer="layout" svg:width="19.811cm" svg:height="5.333cm" svg:x="1.27cm" svg:y="2.921cm">
          <text:p text:style-name="P6"><text:span text:style-name="T2">Run </text:span><text:span text:style-name="T2">and </text:span><text:span text:style-name="T2">Oper</text:span><text:span text:style-name="T2">ate </text:span><text:span text:style-name="T2">Mari</text:span><text:span text:style-name="T2">aDB</text:span></text:p>
          <text:p text:style-name="P6"><text:span text:style-name="T2">in a </text:span><text:span text:style-name="T2">Cloud </text:span><text:span text:style-name="T2">Nativ</text:span><text:span text:style-name="T2">e 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5" draw:layer="layout" svg:width="17.779cm" svg:height="1.396cm" svg:x="1.271cm" svg:y="9.143cm">
          <text:p text:style-name="P4"><text:span text:style-name="T3">Using the MariaDB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5" draw:layer="layout" svg:width="17.779cm" svg:height="1.015cm" svg:x="1.27cm" svg:y="11.811cm">
          <text:p text:style-name="P4"><text:span text:style-name="T4">Martin Montes <text:s/>· <text:s/>Lead Engineer, MariaDB Corp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8" draw:layer="layout" svg:width="4.063cm" svg:height="4.063cm" svg:x="20.574cm" svg:y="2.1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9" draw:text-style-name="P3" draw:layer="layout" svg:width="2.945cm" svg:height="2.945cm" svg:x="21.133cm" svg:y="2.591cm">
          <draw:image xlink:href="Pictures/100000010000010000000100862132B4217EF112.png" xlink:type="simple" xlink:show="embed" xlink:actuate="onLoad" draw:mime-type="image/png">
            <text:p/>
          </draw:image>
          <svg:desc>preencoded.png</svg:desc>
        </draw:frame>
        <draw:custom-shape draw:name="Shape 7" draw:style-name="gr10" draw:text-style-name="P9" draw:layer="layout" svg:width="4.063cm" svg:height="4.063cm" svg:x="20.574cm" svg:y="6.731cm">
          <text:p/>
          <draw:enhanced-geometry draw:mirror-horizontal="false" draw:mirror-vertical="false" svg:viewBox="0 0 0 0" draw:text-areas="?f5 ?f5 ?f6 ?f7" draw:type="ooxml-roundRect" draw:modifiers="112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2" draw:style-name="gr9" draw:text-style-name="P3" draw:layer="layout" svg:width="3.047cm" svg:height="1.98cm" svg:x="21.082cm" svg:y="7.772cm">
          <draw:image xlink:href="Pictures/1000000100000190000001044860CFBFF0406581.png" xlink:type="simple" xlink:show="embed" xlink:actuate="onLoad" draw:mime-type="image/png">
            <text:p/>
          </draw:image>
          <svg:desc>preencoded.png</svg:desc>
        </draw:frame>
        <presentation:notes draw:style-name="dp2">
          <draw:page-thumbnail draw:name="Slide Image Placeholder 1" draw:style-name="gr11" draw:layer="layout" svg:width="15.239cm" svg:height="8.572cm" svg:x="1.905cm" svg:y="3.175cm" draw:page-number="1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elcome. 30 minutes: 15 slides + 15 live demo. Topic: MariaDB Operator — the cloud-native way to run and operate MariaDB on Kubernete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12" draw:text-style-name="P14" draw:layer="layout" svg:width="9.651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3" draw:text-style-name="P15" draw:layer="layout" svg:width="7.873cm" svg:height="7.873cm" svg:x="0.889cm" svg:y="0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mage 0" draw:style-name="gr14" draw:text-style-name="P16" draw:layer="layout" svg:width="6.349cm" svg:height="6.349cm" svg:x="1.651cm" svg:y="0.762cm">
          <svg:desc>/home/claude/profile-crop.png</svg:desc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15" draw:text-style-name="P18" draw:layer="layout" svg:width="8.889cm" svg:height="1.167cm" svg:x="0.381cm" svg:y="7.417cm">
          <text:p text:style-name="P17"><text:span text:style-name="T7">Martin Mo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" draw:text-style-name="P18" draw:layer="layout" svg:width="8.889cm" svg:height="0.761cm" svg:x="0.381cm" svg:y="8.509cm">
          <text:p text:style-name="P17"><text:span text:style-name="T8">Lead Engin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" draw:text-style-name="P18" draw:layer="layout" svg:width="8.889cm" svg:height="0.71cm" svg:x="0.381cm" svg:y="9.195cm">
          <text:p text:style-name="P17"><text:span text:style-name="T9">MariaDB Corp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9" draw:text-style-name="P3" draw:layer="layout" svg:width="0.659cm" svg:height="0.659cm" svg:x="1.27cm" svg:y="10.084cm">
          <draw:image xlink:href="Pictures/100000010000010000000100A61CB24CF1AD9A63.png" xlink:type="simple" xlink:show="embed" xlink:actuate="onLoad" draw:mime-type="image/png">
            <text:p/>
          </draw:image>
          <svg:desc>preencoded.png</svg:desc>
        </draw:frame>
        <draw:custom-shape draw:name="Text 5" draw:style-name="gr18" draw:text-style-name="P5" draw:layer="layout" svg:width="6.857cm" svg:height="0.913cm" svg:x="2.184cm" svg:y="9.957cm">
          <text:p text:style-name="P4"><text:span text:style-name="T10">mmontes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9" draw:text-style-name="P3" draw:layer="layout" svg:width="0.659cm" svg:height="0.659cm" svg:x="1.27cm" svg:y="11.1cm">
          <draw:image xlink:href="Pictures/1000000100000100000001009267FAE5BE3445AB.png" xlink:type="simple" xlink:show="embed" xlink:actuate="onLoad" draw:mime-type="image/png">
            <text:p/>
          </draw:image>
          <svg:desc>preencoded.png</svg:desc>
        </draw:frame>
        <draw:custom-shape draw:name="Text 6" draw:style-name="gr19" draw:text-style-name="P5" draw:layer="layout" svg:width="6.857cm" svg:height="0.913cm" svg:x="2.184cm" svg:y="10.973cm">
          <text:p text:style-name="P4"><text:span text:style-name="T10">mmontesper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9" draw:text-style-name="P3" draw:layer="layout" svg:width="0.659cm" svg:height="0.659cm" svg:x="1.27cm" svg:y="12.116cm">
          <draw:image xlink:href="Pictures/100000010000010000000100463E6744CE35361C.png" xlink:type="simple" xlink:show="embed" xlink:actuate="onLoad" draw:mime-type="image/png">
            <text:p/>
          </draw:image>
          <svg:desc>preencoded.png</svg:desc>
        </draw:frame>
        <draw:custom-shape draw:name="Text 7" draw:style-name="gr20" draw:text-style-name="P5" draw:layer="layout" svg:width="6.857cm" svg:height="0.913cm" svg:x="2.184cm" svg:y="11.989cm">
          <text:p text:style-name="P4"><text:span text:style-name="T10">@m_montes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9" draw:text-style-name="P3" draw:layer="layout" svg:width="0.659cm" svg:height="0.659cm" svg:x="1.27cm" svg:y="13.132cm">
          <draw:image xlink:href="Pictures/10000001000001000000010007F2C46B649B4731.png" xlink:type="simple" xlink:show="embed" xlink:actuate="onLoad" draw:mime-type="image/png">
            <text:p/>
          </draw:image>
          <svg:desc>preencoded.png</svg:desc>
        </draw:frame>
        <draw:custom-shape draw:name="Text 8" draw:style-name="gr21" draw:text-style-name="P5" draw:layer="layout" svg:width="6.857cm" svg:height="0.913cm" svg:x="2.184cm" svg:y="13.005cm">
          <text:p text:style-name="P4"><text:span text:style-name="T10">mmontes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5" draw:layer="layout" svg:width="13.969cm" svg:height="1.396cm" svg:x="10.414cm" svg:y="0.889cm">
          <text:p text:style-name="P4"><text:span text:style-name="T11">whoa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3" draw:text-style-name="P19" draw:layer="layout" svg:width="13.969cm" svg:height="4.952cm" svg:x="10.414cm" svg:y="2.667cm">
          <text:p/>
          <draw:enhanced-geometry draw:mirror-horizontal="false" draw:mirror-vertical="false" svg:viewBox="0 0 0 0" draw:text-areas="?f5 ?f5 ?f6 ?f7" draw:type="ooxml-roundRect" draw:modifiers="615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1" draw:style-name="gr24" draw:text-style-name="P5" draw:layer="layout" svg:width="12.953cm" svg:height="2.285cm" svg:x="10.922cm" svg:y="2.921cm">
          <text:p text:style-name="P4"><text:span text:style-name="T12">Creator &amp; Lead Maintainer</text:span></text:p>
          <text:p text:style-name="P4"><text:span text:style-name="T13">mariadb-operator</text:span><text:span text:style-name="T14"> — Kubernetes operator for MariaDB, built with Go and controller-runti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" draw:text-style-name="P5" draw:layer="layout" svg:width="12.953cm" svg:height="0.761cm" svg:x="10.922cm" svg:y="5.461cm">
          <text:p text:style-name="P4"><text:span text:style-name="T15">Specialized in <text:s/></text:span><text:span text:style-name="T16">Kubernetes <text:s/>· <text:s/>Golang <text:s/>· <text:s/>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6" draw:text-style-name="P5" draw:layer="layout" svg:width="12.953cm" svg:height="0.812cm" svg:x="10.922cm" svg:y="6.401cm">
          <text:p text:style-name="P4"><text:span text:style-name="T15">Maintains the operator, ships features, grows the commun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7" draw:text-style-name="P8" draw:layer="layout" svg:width="4.444cm" svg:height="1.066cm" svg:x="10.414cm" svg:y="8.128cm">
          <text:p/>
          <draw:enhanced-geometry draw:mirror-horizontal="false" draw:mirror-vertical="false" svg:viewBox="0 0 0 0" draw:text-areas="?f5 ?f5 ?f6 ?f7" draw:type="ooxml-roundRect" draw:modifiers="476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5" draw:style-name="gr28" draw:text-style-name="P18" draw:layer="layout" svg:width="4.444cm" svg:height="1.066cm" svg:x="10.414cm" svg:y="8.128cm">
          <text:p text:style-name="P17"><text:span text:style-name="T17">Cloud-n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7" draw:text-style-name="P8" draw:layer="layout" svg:width="4.444cm" svg:height="1.066cm" svg:x="15.24cm" svg:y="8.128cm">
          <text:p/>
          <draw:enhanced-geometry draw:mirror-horizontal="false" draw:mirror-vertical="false" svg:viewBox="0 0 0 0" draw:text-areas="?f5 ?f5 ?f6 ?f7" draw:type="ooxml-roundRect" draw:modifiers="476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7" draw:style-name="gr29" draw:text-style-name="P18" draw:layer="layout" svg:width="4.444cm" svg:height="1.066cm" svg:x="15.24cm" svg:y="8.128cm">
          <text:p text:style-name="P17"><text:span text:style-name="T17">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7" draw:text-style-name="P8" draw:layer="layout" svg:width="4.444cm" svg:height="1.066cm" svg:x="20.066cm" svg:y="8.128cm">
          <text:p/>
          <draw:enhanced-geometry draw:mirror-horizontal="false" draw:mirror-vertical="false" svg:viewBox="0 0 0 0" draw:text-areas="?f5 ?f5 ?f6 ?f7" draw:type="ooxml-roundRect" draw:modifiers="476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9" draw:style-name="gr30" draw:text-style-name="P18" draw:layer="layout" svg:width="4.444cm" svg:height="1.066cm" svg:x="20.066cm" svg:y="8.128cm">
          <text:p text:style-name="P17"><text:span text:style-name="T17">Cloud-agnos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31" draw:text-style-name="P20" draw:layer="layout" svg:width="13.969cm" svg:height="3.809cm" svg:x="10.414cm" svg:y="9.652cm">
          <text:p/>
          <draw:enhanced-geometry draw:mirror-horizontal="false" draw:mirror-vertical="false" svg:viewBox="0 0 0 0" draw:text-areas="?f5 ?f5 ?f6 ?f7" draw:type="ooxml-roundRect" draw:modifiers="8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1" draw:style-name="gr32" draw:text-style-name="P5" draw:layer="layout" svg:width="12.953cm" svg:height="3.174cm" svg:x="10.922cm" svg:y="9.957cm">
          <text:p text:style-name="P4"><text:span text:style-name="T18">“</text:span><text:span text:style-name="T18">Run and operate MariaDB in a cloud native way — declaratively manage your database using Kubernetes CRDs rather than imperative commands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2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Brief intro. Creator and lead maintainer. Keep this to ~1 minute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33" draw:text-style-name="P21" draw:layer="layout" svg:width="10.667cm" svg:height="10.667cm" svg:x="19.812cm" svg:y="-3.3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4" draw:text-style-name="P22" draw:layer="layout" svg:width="8.127cm" svg:height="8.127cm" svg:x="-2.54cm" svg:y="9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35" draw:text-style-name="P5" draw:layer="layout" svg:width="22.859cm" svg:height="1.523cm" svg:x="1.27cm" svg:y="0.635cm">
          <text:p text:style-name="P4"><text:span text:style-name="T19">Project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6" draw:text-style-name="P5" draw:layer="layout" svg:width="22.859cm" svg:height="0.888cm" svg:x="1.27cm" svg:y="2.083cm">
          <text:p text:style-name="P4"><text:span text:style-name="T8">From standalone MariaDB to full multi-cluster replication — in 4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9" draw:text-style-name="P3" draw:layer="layout" svg:width="23.875cm" svg:height="11.302cm" svg:x="0.762cm" svg:y="2.54cm">
          <draw:image xlink:href="Pictures/10000001000005F00000039847BBCBFBD0BA70AC.png" xlink:type="simple" xlink:show="embed" xlink:actuate="onLoad" draw:mime-type="image/png">
            <text:p/>
          </draw:image>
          <svg:desc>/home/claude/timeline_v8.png</svg:desc>
        </draw:frame>
        <presentation:notes draw:style-name="dp2">
          <draw:page-thumbnail draw:name="Slide Image Placeholder 1" draw:style-name="gr11" draw:layer="layout" svg:width="15.239cm" svg:height="8.572cm" svg:x="1.905cm" svg:y="3.175cm" draw:page-number="3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alk the timeline left to right. Emphasize early velocity, consolidation in 2024, and the big 2025-2026 milestones. Multi-cluster is today's demo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37" draw:text-style-name="P23" draw:layer="layout" svg:width="11.429cm" svg:height="11.429cm" svg:x="19.05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4" draw:text-style-name="P22" draw:layer="layout" svg:width="8.889cm" svg:height="8.889cm" svg:x="-2.54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38" draw:text-style-name="P5" draw:layer="layout" svg:width="21.589cm" svg:height="1.523cm" svg:x="1.27cm" svg:y="0.711cm">
          <text:p text:style-name="P4"><text:span text:style-name="T19">Community &amp; Ad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5" draw:layer="layout" svg:width="21.589cm" svg:height="0.812cm" svg:x="1.27cm" svg:y="2.159cm">
          <text:p text:style-name="P4"><text:span text:style-name="T20">mariadb-operator · github.com/mariadb-operator/mariadb-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9" draw:layer="layout" svg:width="5.333cm" svg:height="4.317cm" svg:x="1.143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0" draw:style-name="gr9" draw:text-style-name="P3" draw:layer="layout" svg:width="1.015cm" svg:height="1.015cm" svg:x="3.302cm" svg:y="3.556cm">
          <draw:image xlink:href="Pictures/100000010000010000000100F9B4A047F1FE0CCD.png" xlink:type="simple" xlink:show="embed" xlink:actuate="onLoad" draw:mime-type="image/png">
            <text:p/>
          </draw:image>
          <svg:desc>preencoded.png</svg:desc>
        </draw:frame>
        <draw:custom-shape draw:name="Text 5" draw:style-name="gr41" draw:text-style-name="P18" draw:layer="layout" svg:width="4.927cm" svg:height="1.32cm" svg:x="1.346cm" svg:y="4.775cm">
          <text:p text:style-name="P17"><text:span text:style-name="T21">~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18" draw:layer="layout" svg:width="4.927cm" svg:height="0.71cm" svg:x="1.346cm" svg:y="6.096cm">
          <text:p text:style-name="P17"><text:span text:style-name="T22">GitHub St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0" draw:text-style-name="P9" draw:layer="layout" svg:width="5.333cm" svg:height="4.317cm" svg:x="7.112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1" draw:style-name="gr9" draw:text-style-name="P3" draw:layer="layout" svg:width="1.015cm" svg:height="1.015cm" svg:x="9.271cm" svg:y="3.556cm">
          <draw:image xlink:href="Pictures/100000010000010000000100554DD106E739B3A2.png" xlink:type="simple" xlink:show="embed" xlink:actuate="onLoad" draw:mime-type="image/png">
            <text:p/>
          </draw:image>
          <svg:desc>preencoded.png</svg:desc>
        </draw:frame>
        <draw:custom-shape draw:name="Text 8" draw:style-name="gr43" draw:text-style-name="P18" draw:layer="layout" svg:width="4.927cm" svg:height="1.32cm" svg:x="7.315cm" svg:y="4.775cm">
          <text:p text:style-name="P17"><text:span text:style-name="T21">80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4" draw:text-style-name="P18" draw:layer="layout" svg:width="4.927cm" svg:height="0.71cm" svg:x="7.315cm" svg:y="6.096cm">
          <text:p text:style-name="P17"><text:span text:style-name="T22">Contribu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0" draw:text-style-name="P9" draw:layer="layout" svg:width="5.333cm" svg:height="4.317cm" svg:x="13.081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2" draw:style-name="gr9" draw:text-style-name="P3" draw:layer="layout" svg:width="1.015cm" svg:height="1.015cm" svg:x="15.24cm" svg:y="3.556cm">
          <draw:image xlink:href="Pictures/10000001000001000000010008128A6F9F5B0610.png" xlink:type="simple" xlink:show="embed" xlink:actuate="onLoad" draw:mime-type="image/png">
            <text:p/>
          </draw:image>
          <svg:desc>preencoded.png</svg:desc>
        </draw:frame>
        <draw:custom-shape draw:name="Text 11" draw:style-name="gr45" draw:text-style-name="P18" draw:layer="layout" svg:width="4.927cm" svg:height="1.32cm" svg:x="13.284cm" svg:y="4.775cm">
          <text:p text:style-name="P17"><text:span text:style-name="T21">4K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6" draw:text-style-name="P18" draw:layer="layout" svg:width="4.927cm" svg:height="0.71cm" svg:x="13.284cm" svg:y="6.096cm">
          <text:p text:style-name="P17"><text:span text:style-name="T22">Comm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0" draw:text-style-name="P9" draw:layer="layout" svg:width="5.333cm" svg:height="4.317cm" svg:x="19.05cm" svg:y="3.302cm">
          <text:p/>
          <draw:enhanced-geometry draw:mirror-horizontal="false" draw:mirror-vertical="false" svg:viewBox="0 0 0 0" draw:text-areas="?f5 ?f5 ?f6 ?f7" draw:type="ooxml-roundRect" draw:modifiers="82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3" draw:style-name="gr9" draw:text-style-name="P3" draw:layer="layout" svg:width="1.015cm" svg:height="1.015cm" svg:x="21.209cm" svg:y="3.556cm">
          <draw:image xlink:href="Pictures/100000010000010000000100299B6E8F3AAF9124.png" xlink:type="simple" xlink:show="embed" xlink:actuate="onLoad" draw:mime-type="image/png">
            <text:p/>
          </draw:image>
          <svg:desc>preencoded.png</svg:desc>
        </draw:frame>
        <draw:custom-shape draw:name="Text 14" draw:style-name="gr47" draw:text-style-name="P18" draw:layer="layout" svg:width="4.927cm" svg:height="1.32cm" svg:x="19.253cm" svg:y="4.775cm">
          <text:p text:style-name="P17"><text:span text:style-name="T21">8M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8" draw:text-style-name="P18" draw:layer="layout" svg:width="4.927cm" svg:height="0.71cm" svg:x="19.253cm" svg:y="6.096cm">
          <text:p text:style-name="P17"><text:span text:style-name="T22">Image Pu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5" draw:layer="layout" svg:width="14.731cm" svg:height="0.888cm" svg:x="1.143cm" svg:y="8.077cm">
          <text:p text:style-name="P4"><text:span text:style-name="T23">★ </text:span><text:span text:style-name="T23">GitHub Stars over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0" draw:style-name="gr50" draw:text-style-name="P3" draw:layer="layout" svg:width="14.985cm" svg:height="3.936cm" svg:x="1.143cm" svg:y="8.9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Shape 17" draw:style-name="gr51" draw:text-style-name="P19" draw:layer="layout" svg:width="7.365cm" svg:height="7.238cm" svg:x="17.018cm" svg:y="7.925cm">
          <text:p/>
          <draw:enhanced-geometry draw:mirror-horizontal="false" draw:mirror-vertical="false" svg:viewBox="0 0 0 0" draw:text-areas="?f5 ?f5 ?f6 ?f7" draw:type="ooxml-roundRect" draw:modifiers="350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4" draw:style-name="gr9" draw:text-style-name="P3" draw:layer="layout" svg:width="6.73cm" svg:height="6.73cm" svg:x="17.323cm" svg:y="8.179cm">
          <draw:image xlink:href="Pictures/100000010000019000000190603268EAEA4351F2.png" xlink:type="simple" xlink:show="embed" xlink:actuate="onLoad" draw:mime-type="image/png">
            <text:p/>
          </draw:image>
          <svg:desc>preencoded.png</svg:desc>
        </draw:frame>
        <draw:custom-shape draw:name="Text 18" draw:style-name="gr52" draw:text-style-name="P18" draw:layer="layout" svg:width="4.444cm" svg:height="0.71cm" svg:x="1.143cm" svg:y="13.03cm">
          <text:p text:style-name="P17"><text:span text:style-name="T24">157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3" draw:text-style-name="P18" draw:layer="layout" svg:width="4.444cm" svg:height="0.507cm" svg:x="1.143cm" svg:y="13.665cm">
          <text:p text:style-name="P17"><text:span text:style-name="T25">Rele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4" draw:text-style-name="P18" draw:layer="layout" svg:width="4.444cm" svg:height="0.71cm" svg:x="6.223cm" svg:y="13.03cm">
          <text:p text:style-name="P17"><text:span text:style-name="T24">v26.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5" draw:text-style-name="P18" draw:layer="layout" svg:width="4.444cm" svg:height="0.507cm" svg:x="6.223cm" svg:y="13.665cm">
          <text:p text:style-name="P17"><text:span text:style-name="T25">La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6" draw:text-style-name="P18" draw:layer="layout" svg:width="4.444cm" svg:height="0.71cm" svg:x="11.303cm" svg:y="13.03cm">
          <text:p text:style-name="P17"><text:span text:style-name="T2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7" draw:text-style-name="P18" draw:layer="layout" svg:width="4.444cm" svg:height="0.507cm" svg:x="11.303cm" svg:y="13.665cm">
          <text:p text:style-name="P17"><text:span text:style-name="T25">Si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4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Numbers tell the story of a healthy, growing open source project. ~1K stars, 80+ contributors, 10M+ image pulls. The growth curve is steepening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58" draw:text-style-name="P24" draw:layer="layout" svg:width="15.239cm" svg:height="15.239cm" svg:x="16.51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4" draw:text-style-name="P22" draw:layer="layout" svg:width="10.159cm" svg:height="10.159cm" svg:x="-3.81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27" draw:text-style-name="P8" draw:layer="layout" svg:width="3.301cm" svg:height="0.964cm" svg:x="1.397cm" svg:y="4.064cm">
          <text:p/>
          <draw:enhanced-geometry draw:mirror-horizontal="false" draw:mirror-vertical="false" svg:viewBox="0 0 0 0" draw:text-areas="?f5 ?f5 ?f6 ?f7" draw:type="ooxml-roundRect" draw:modifiers="210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59" draw:text-style-name="P18" draw:layer="layout" svg:width="3.301cm" svg:height="0.964cm" svg:x="1.397cm" svg:y="4.064cm">
          <text:p text:style-name="P17"><text:span text:style-name="T26">DAY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" draw:text-style-name="P5" draw:layer="layout" svg:width="19.049cm" svg:height="1.828cm" svg:x="1.397cm" svg:y="5.334cm">
          <text:p text:style-name="P4"><text:span text:style-name="T27">Cluster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1" draw:text-style-name="P5" draw:layer="layout" svg:width="19.049cm" svg:height="0.888cm" svg:x="1.397cm" svg:y="7.366cm">
          <text:p text:style-name="P4"><text:span text:style-name="T28">Provision a production-ready MariaDB cluster — declarative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62" draw:text-style-name="P3" draw:layer="layout" svg:x1="1.397cm" svg:y1="8.509cm" svg:x2="12.827cm" svg:y2="8.51cm">
          <text:p/>
        </draw:line>
        <presentation:notes draw:style-name="dp2">
          <draw:page-thumbnail draw:name="Slide Image Placeholder 1" draw:style-name="gr11" draw:layer="layout" svg:width="15.239cm" svg:height="8.572cm" svg:x="1.905cm" svg:y="3.175cm" draw:page-number="5" presentation:class="page"/>
          <draw:frame draw:name="Notes Placeholder 2" presentation:style-name="pr3" draw:text-style-name="P2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63" draw:text-style-name="P18" draw:layer="layout" svg:width="2.285cm" svg:height="0.71cm" svg:x="1.143cm" svg:y="0.559cm">
          <text:p text:style-name="P17"><text:span text:style-name="T29">DAY 1 · 1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4" draw:text-style-name="P5" draw:layer="layout" svg:width="11.683cm" svg:height="1.218cm" svg:x="1.143cm" svg:y="1.422cm">
          <text:p text:style-name="P4"><text:span text:style-name="T30">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5" draw:text-style-name="P5" draw:layer="layout" svg:width="11.683cm" svg:height="0.659cm" svg:x="1.143cm" svg:y="2.591cm">
          <text:p text:style-name="P4"><text:span text:style-name="T31">Choose your HA strate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66" draw:text-style-name="P5" draw:layer="layout" svg:width="11.175cm" svg:height="1.117cm" svg:x="1.6cm" svg:y="3.505cm">
          <text:p text:style-name="P4"><text:span text:style-name="T32">Standalone: </text:span><text:span text:style-name="T33">single replica — dev / test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67" draw:text-style-name="P5" draw:layer="layout" svg:width="11.175cm" svg:height="1.117cm" svg:x="1.6cm" svg:y="4.826cm">
          <text:p text:style-name="P4"><text:span text:style-name="T32">Replication: </text:span><text:span text:style-name="T33">semi-sync, automated failover — recommended for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68" draw:text-style-name="P5" draw:layer="layout" svg:width="11.175cm" svg:height="1.117cm" svg:x="1.6cm" svg:y="6.147cm">
          <text:p text:style-name="P4"><text:span text:style-name="T32">Galera: </text:span><text:span text:style-name="T33">synchronous multi-master — alternative HA 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69" draw:text-style-name="P5" draw:layer="layout" svg:width="11.175cm" svg:height="1.117cm" svg:x="1.6cm" svg:y="7.468cm">
          <text:p text:style-name="P4"><text:span text:style-name="T32">Multi-cluster: </text:span><text:span text:style-name="T33">cross-cluster replication for multi-region deployments and blue-green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70" draw:text-style-name="P5" draw:layer="layout" svg:width="11.175cm" svg:height="1.117cm" svg:x="1.6cm" svg:y="8.788cm">
          <text:p text:style-name="P4"><text:span text:style-name="T33">All topologies share the same MariaDB CRD — just flip feature 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1" draw:layer="layout" svg:width="10.87cm" svg:height="11.886cm" svg:x="13.665cm" svg:y="1.524cm">
          <text:p text:style-name="P30"><text:span text:style-name="T34"># Standalone — single node (dev, test)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replicas</text:span><text:span text:style-name="T36">: </text:span><text:span text:style-name="T38">1</text:span></text:p>
          <text:p text:style-name="P30"><text:span text:style-name="T39">---</text:span></text:p>
          <text:p text:style-name="P30"><text:span text:style-name="T34"># Replication — semi-sync, auto failover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replicas</text:span><text:span text:style-name="T36">: </text:span><text:span text:style-name="T38">3</text:span></text:p>
          <text:p text:style-name="P30"><text:span text:style-name="T37"><text:s text:c="2"/></text:span><text:span text:style-name="T35">replication</text:span><text:span text:style-name="T36">:</text:span></text:p>
          <text:p text:style-name="P30"><text:span text:style-name="T37"><text:s text:c="4"/></text:span><text:span text:style-name="T35">enabled</text:span><text:span text:style-name="T36">: </text:span><text:span text:style-name="T40">true</text:span></text:p>
          <text:p text:style-name="P30"><text:span text:style-name="T37"><text:s text:c="4"/></text:span><text:span text:style-name="T35">semiSyncEnabled</text:span><text:span text:style-name="T36">: </text:span><text:span text:style-name="T40">true</text:span></text:p>
          <text:p text:style-name="P30"><text:span text:style-name="T37"><text:s text:c="4"/></text:span><text:span text:style-name="T35">primary</text:span><text:span text:style-name="T36">:</text:span></text:p>
          <text:p text:style-name="P30"><text:span text:style-name="T37"><text:s text:c="6"/></text:span><text:span text:style-name="T35">autoFailover</text:span><text:span text:style-name="T36">: </text:span><text:span text:style-name="T40">true</text:span></text:p>
          <text:p text:style-name="P30"><text:span text:style-name="T39">---</text:span></text:p>
          <text:p text:style-name="P30"><text:span text:style-name="T34"># Galera — synchronous multi-master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replicas</text:span><text:span text:style-name="T36">: </text:span><text:span text:style-name="T38">3</text:span></text:p>
          <text:p text:style-name="P30"><text:span text:style-name="T37"><text:s text:c="2"/></text:span><text:span text:style-name="T35">galera</text:span><text:span text:style-name="T36">:</text:span></text:p>
          <text:p text:style-name="P30"><text:span text:style-name="T37"><text:s text:c="4"/></text:span><text:span text:style-name="T35">enabled</text:span><text:span text:style-name="T36">: </text:span><text:span text:style-name="T40">true</text:span></text:p>
          <text:p text:style-name="P30"><text:span text:style-name="T39">---</text:span></text:p>
          <text:p text:style-name="P30"><text:span text:style-name="T34"># Multi-cluster — cross-cluster replication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replicas</text:span><text:span text:style-name="T36">: </text:span><text:span text:style-name="T38">3</text:span></text:p>
          <text:p text:style-name="P30"><text:span text:style-name="T37"><text:s text:c="2"/></text:span><text:span text:style-name="T35">replication</text:span><text:span text:style-name="T36">:</text:span></text:p>
          <text:p text:style-name="P30"><text:span text:style-name="T37"><text:s text:c="4"/></text:span><text:span text:style-name="T35">enabled</text:span><text:span text:style-name="T36">: </text:span><text:span text:style-name="T40">true</text:span></text:p>
          <text:p text:style-name="P30"><text:span text:style-name="T37"><text:s text:c="2"/></text:span><text:span text:style-name="T35">multiCluster</text:span><text:span text:style-name="T36">:</text:span></text:p>
          <text:p text:style-name="P30"><text:span text:style-name="T37"><text:s text:c="4"/></text:span><text:span text:style-name="T35">enabled</text:span><text:span text:style-name="T36">: </text:span><text:span text:style-name="T40">true</text:span></text:p>
          <text:p text:style-name="P30"><text:span text:style-name="T37"><text:s text:c="4"/></text:span><text:span text:style-name="T35">primary</text:span><text:span text:style-name="T36">: </text:span><text:span text:style-name="T37">mariadb-eu-south</text:span></text:p>
          <text:p text:style-name="P30"><text:span text:style-name="T37"><text:s text:c="4"/></text:span><text:span text:style-name="T35">members</text:span><text:span text:style-name="T36">:</text:span></text:p>
          <text:p text:style-name="P30"><text:span text:style-name="T37"><text:s text:c="6"/></text:span><text:span text:style-name="T36">- </text:span><text:span text:style-name="T35">name</text:span><text:span text:style-name="T36">: </text:span><text:span text:style-name="T37">mariadb-eu-south</text:span></text:p>
          <text:p text:style-name="P30"><text:span text:style-name="T37"><text:s text:c="6"/></text:span><text:span text:style-name="T36">- </text:span><text:span text:style-name="T35">name</text:span><text:span text:style-name="T36">: </text:span><text:span text:style-name="T37">mariadb-eu-central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6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Start here. Choose the right topology for the workload. Galera is our go-to for production HA on a single cluster. Multi-cluster unlocks geo-HA and zero-downtime upgrade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76" draw:text-style-name="P18" draw:layer="layout" svg:width="2.285cm" svg:height="0.71cm" svg:x="1.143cm" svg:y="0.559cm">
          <text:p text:style-name="P17"><text:span text:style-name="T29">DAY 1 · 2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7" draw:text-style-name="P5" draw:layer="layout" svg:width="11.683cm" svg:height="1.218cm" svg:x="1.143cm" svg:y="1.422cm">
          <text:p text:style-name="P4"><text:span text:style-name="T30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8" draw:text-style-name="P5" draw:layer="layout" svg:width="11.683cm" svg:height="0.659cm" svg:x="1.143cm" svg:y="2.591cm">
          <text:p text:style-name="P4"><text:span text:style-name="T31">Persistent volumes for you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79" draw:text-style-name="P5" draw:layer="layout" svg:width="11.175cm" svg:height="1.117cm" svg:x="1.6cm" svg:y="3.505cm">
          <text:p text:style-name="P4"><text:span text:style-name="T32">StorageClass: </text:span><text:span text:style-name="T33">defaults to cluster default — you can bring your 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0" draw:text-style-name="P5" draw:layer="layout" svg:width="11.175cm" svg:height="1.117cm" svg:x="1.6cm" svg:y="4.826cm">
          <text:p text:style-name="P4"><text:span text:style-name="T32">Local storage: </text:span><text:span text:style-name="T33">strongly recommended — topolvm or local-path-provisioner avoids network I/O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81" draw:text-style-name="P5" draw:layer="layout" svg:width="11.175cm" svg:height="1.117cm" svg:x="1.6cm" svg:y="6.147cm">
          <text:p text:style-name="P4"><text:span text:style-name="T32">Block storage: </text:span><text:span text:style-name="T33">high IOPs preferred when local isn't an option — e.g. AWS io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82" draw:text-style-name="P5" draw:layer="layout" svg:width="11.175cm" svg:height="1.117cm" svg:x="1.6cm" svg:y="7.468cm">
          <text:p text:style-name="P4"><text:span text:style-name="T32">Volume resize: </text:span><text:span text:style-name="T33">update size at runtime, operator handles the expa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83" draw:text-style-name="P5" draw:layer="layout" svg:width="11.175cm" svg:height="1.117cm" svg:x="1.6cm" svg:y="8.788cm">
          <text:p text:style-name="P4"><text:span text:style-name="T33">StorageClass must have allowVolumeExpansion: true for online re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1" draw:layer="layout" svg:width="10.87cm" svg:height="11.886cm" svg:x="13.665cm" svg:y="1.524cm"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storage</text:span><text:span text:style-name="T36">:</text:span></text:p>
          <text:p text:style-name="P30"><text:span text:style-name="T34"><text:s text:c="4"/></text:span><text:span text:style-name="T34"># Choose any StorageClass in your cluster.</text:span></text:p>
          <text:p text:style-name="P30"><text:span text:style-name="T34"><text:s text:c="4"/></text:span><text:span text:style-name="T34"># Local storage (e.g. topolvm) avoids</text:span></text:p>
          <text:p text:style-name="P30"><text:span text:style-name="T34"><text:s text:c="4"/></text:span><text:span text:style-name="T34"># network latency.</text:span></text:p>
          <text:p text:style-name="P30"><text:span text:style-name="T37"><text:s text:c="4"/></text:span><text:span text:style-name="T35">storageClassName</text:span><text:span text:style-name="T36">: </text:span><text:span text:style-name="T37">topolvm</text:span></text:p>
          <text:p text:style-name="P30"><text:span text:style-name="T37"><text:s text:c="4"/></text:span><text:span text:style-name="T35">size</text:span><text:span text:style-name="T36">: </text:span><text:span text:style-name="T38">100Gi</text:span></text:p>
          <text:p text:style-name="P30"><text:span text:style-name="T37"/></text:p>
          <text:p text:style-name="P30"><text:span text:style-name="T34"><text:s text:c="4"/></text:span><text:span text:style-name="T34"># Grow the volume at runtime: bump size and</text:span></text:p>
          <text:p text:style-name="P30"><text:span text:style-name="T34"><text:s text:c="4"/></text:span><text:span text:style-name="T34"># the operator handles the resize.</text:span></text:p>
          <text:p text:style-name="P30"><text:span text:style-name="T34"><text:s text:c="4"/></text:span><text:span text:style-name="T34"># StorageClass must have:</text:span></text:p>
          <text:p text:style-name="P30"><text:span text:style-name="T34"><text:s text:c="4"/></text:span><text:span text:style-name="T34"># <text:s text:c="2"/>allowVolumeExpansion: true</text:span></text:p>
          <text:p text:style-name="P30"><text:span text:style-name="T37"><text:s text:c="4"/></text:span><text:span text:style-name="T35">resizeInUseVolumes</text:span><text:span text:style-name="T36">: </text:span><text:span text:style-name="T40">true</text:span></text:p>
          <text:p text:style-name="P30"><text:span text:style-name="T37"><text:s text:c="4"/></text:span><text:span text:style-name="T35">waitForVolumeResize</text:span><text:span text:style-name="T36">: </text:span><text:span text:style-name="T40">true</text:span></text:p>
          <text:p text:style-name="P4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7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Local storage is strongly recommended for MariaDB to avoid I/O latency. Volume resize works online — no downtime required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84" draw:text-style-name="P18" draw:layer="layout" svg:width="2.285cm" svg:height="0.71cm" svg:x="1.143cm" svg:y="0.559cm">
          <text:p text:style-name="P17"><text:span text:style-name="T29">DAY 1 · 3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5" draw:text-style-name="P5" draw:layer="layout" svg:width="11.683cm" svg:height="1.218cm" svg:x="1.143cm" svg:y="1.422cm">
          <text:p text:style-name="P4"><text:span text:style-name="T30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6" draw:text-style-name="P5" draw:layer="layout" svg:width="11.683cm" svg:height="0.659cm" svg:x="1.143cm" svg:y="2.591cm">
          <text:p text:style-name="P4"><text:span text:style-name="T31">Right-size CPU &amp; memory for Maria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87" draw:text-style-name="P5" draw:layer="layout" svg:width="11.175cm" svg:height="1.117cm" svg:x="1.6cm" svg:y="3.505cm">
          <text:p text:style-name="P4"><text:span text:style-name="T32">Requests = Limits: </text:span><text:span text:style-name="T33">set both identical — Kubernetes assigns Guaranteed Q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8" draw:text-style-name="P5" draw:layer="layout" svg:width="11.175cm" svg:height="1.117cm" svg:x="1.6cm" svg:y="4.826cm">
          <text:p text:style-name="P4"><text:span text:style-name="T32">innodb_buffer_pool_size: </text:span><text:span text:style-name="T33">set to 70–80% of memory limit for best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89" draw:text-style-name="P5" draw:layer="layout" svg:width="11.175cm" svg:height="1.117cm" svg:x="1.6cm" svg:y="6.147cm">
          <text:p text:style-name="P4"><text:span text:style-name="T33">Guaranteed QoS pods are never evicted under nod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90" draw:text-style-name="P5" draw:layer="layout" svg:width="11.175cm" svg:height="1.117cm" svg:x="1.6cm" svg:y="7.468cm">
          <text:p text:style-name="P4"><text:span text:style-name="T33">myCnf inlined in the CR — operator mounts it automatic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4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75" draw:text-style-name="P31" draw:layer="layout" svg:width="10.87cm" svg:height="11.886cm" svg:x="13.665cm" svg:y="1.524cm"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resources</text:span><text:span text:style-name="T36">:</text:span></text:p>
          <text:p text:style-name="P30"><text:span text:style-name="T37"><text:s text:c="4"/></text:span><text:span text:style-name="T35">requests</text:span><text:span text:style-name="T36">:</text:span></text:p>
          <text:p text:style-name="P30"><text:span text:style-name="T37"><text:s text:c="6"/></text:span><text:span text:style-name="T35">cpu</text:span><text:span text:style-name="T36">: </text:span><text:span text:style-name="T41">"4"</text:span></text:p>
          <text:p text:style-name="P30"><text:span text:style-name="T37"><text:s text:c="6"/></text:span><text:span text:style-name="T35">memory</text:span><text:span text:style-name="T36">: </text:span><text:span text:style-name="T38">8Gi</text:span></text:p>
          <text:p text:style-name="P30"><text:span text:style-name="T37"><text:s text:c="4"/></text:span><text:span text:style-name="T35">limits</text:span><text:span text:style-name="T36">:</text:span></text:p>
          <text:p text:style-name="P30"><text:span text:style-name="T37"><text:s text:c="6"/></text:span><text:span text:style-name="T35">cpu</text:span><text:span text:style-name="T36">: </text:span><text:span text:style-name="T41">"4"</text:span></text:p>
          <text:p text:style-name="P30"><text:span text:style-name="T37"><text:s text:c="6"/></text:span><text:span text:style-name="T35">memory</text:span><text:span text:style-name="T36">: </text:span><text:span text:style-name="T38">8Gi</text:span></text:p>
          <text:p text:style-name="P30"><text:span text:style-name="T37"/></text:p>
          <text:p text:style-name="P30"><text:span text:style-name="T34"><text:s text:c="2"/></text:span><text:span text:style-name="T34"># innodb_buffer_pool_size should be</text:span></text:p>
          <text:p text:style-name="P30"><text:span text:style-name="T34"><text:s text:c="2"/></text:span><text:span text:style-name="T34"># 70-80% of the memory limit.</text:span></text:p>
          <text:p text:style-name="P30"><text:span text:style-name="T37"><text:s text:c="2"/></text:span><text:span text:style-name="T35">myCnf</text:span><text:span text:style-name="T36">: </text:span><text:span text:style-name="T37">|</text:span></text:p>
          <text:p text:style-name="P30"><text:span text:style-name="T37"><text:s text:c="4"/></text:span><text:span text:style-name="T37">[mariadb]</text:span></text:p>
          <text:p text:style-name="P30"><text:span text:style-name="T37"><text:s text:c="4"/></text:span><text:span text:style-name="T37">innodb_buffer_pool_size=6400M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8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Rule of thumb: 70-80% of memory for the InnoDB buffer pool. Skip CPU limits on dedicated DB nodes to avoid throttling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91" draw:text-style-name="P18" draw:layer="layout" svg:width="2.285cm" svg:height="0.71cm" svg:x="1.143cm" svg:y="0.559cm">
          <text:p text:style-name="P17"><text:span text:style-name="T29">DAY 1 · 4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2" draw:text-style-name="P5" draw:layer="layout" svg:width="11.683cm" svg:height="1.218cm" svg:x="1.143cm" svg:y="1.422cm">
          <text:p text:style-name="P4"><text:span text:style-name="T30">Schedu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3" draw:text-style-name="P5" draw:layer="layout" svg:width="11.683cm" svg:height="0.659cm" svg:x="1.143cm" svg:y="2.591cm">
          <text:p text:style-name="P4"><text:span text:style-name="T31">Isolate and protect your database p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94" draw:text-style-name="P5" draw:layer="layout" svg:width="11.175cm" svg:height="1.117cm" svg:x="1.6cm" svg:y="3.505cm">
          <text:p text:style-name="P4"><text:span text:style-name="T32">Anti-affinity: </text:span><text:span text:style-name="T33">antiAffinityEnabled spreads replicas across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95" draw:text-style-name="P5" draw:layer="layout" svg:width="11.175cm" svg:height="1.117cm" svg:x="1.6cm" svg:y="4.826cm">
          <text:p text:style-name="P4"><text:span text:style-name="T32">Node selector: </text:span><text:span text:style-name="T33">select the right instance type (high IOPs, 10Gbps+) and pin pods to dedicated DB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96" draw:text-style-name="P5" draw:layer="layout" svg:width="11.175cm" svg:height="1.117cm" svg:x="1.6cm" svg:y="6.147cm">
          <text:p text:style-name="P4"><text:span text:style-name="T32">Topology spread: </text:span><text:span text:style-name="T33">distribute evenly across availability z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97" draw:text-style-name="P5" draw:layer="layout" svg:width="11.175cm" svg:height="1.117cm" svg:x="1.6cm" svg:y="7.468cm">
          <text:p text:style-name="P4"><text:span text:style-name="T32">Tolerations: </text:span><text:span text:style-name="T33">combine with node taints to dedicate nodes exclusively to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98" draw:text-style-name="P5" draw:layer="layout" svg:width="11.175cm" svg:height="1.117cm" svg:x="1.6cm" svg:y="8.788cm">
          <text:p text:style-name="P4"><text:span text:style-name="T32">priorityClassName: </text:span><text:span text:style-name="T33">system-node-critical — prevents eviction under nod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1" draw:layer="layout" svg:width="10.87cm" svg:height="11.886cm" svg:x="13.665cm" svg:y="1.524cm"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replicas</text:span><text:span text:style-name="T36">: </text:span><text:span text:style-name="T38">3</text:span></text:p>
          <text:p text:style-name="P30"><text:span text:style-name="T34"><text:s text:c="2"/></text:span><text:span text:style-name="T34"># Spread each replica on a different node.</text:span></text:p>
          <text:p text:style-name="P30"><text:span text:style-name="T37"><text:s text:c="2"/></text:span><text:span text:style-name="T35">affinity</text:span><text:span text:style-name="T36">:</text:span></text:p>
          <text:p text:style-name="P30"><text:span text:style-name="T37"><text:s text:c="4"/></text:span><text:span text:style-name="T35">antiAffinityEnabled</text:span><text:span text:style-name="T36">: </text:span><text:span text:style-name="T40">true</text:span></text:p>
          <text:p text:style-name="P30"><text:span text:style-name="T34"><text:s text:c="2"/></text:span><text:span text:style-name="T34"># Pin Pods to DB-dedicated nodes.</text:span></text:p>
          <text:p text:style-name="P30"><text:span text:style-name="T37"><text:s text:c="2"/></text:span><text:span text:style-name="T35">nodeSelector</text:span><text:span text:style-name="T36">:</text:span></text:p>
          <text:p text:style-name="P30"><text:span text:style-name="T37"><text:s text:c="4"/></text:span><text:span text:style-name="T35">node.kubernetes.io/instance-type</text:span><text:span text:style-name="T36">: </text:span><text:span text:style-name="T37">m6in.xlarge</text:span></text:p>
          <text:p text:style-name="P30"><text:span text:style-name="T34"><text:s text:c="2"/></text:span><text:span text:style-name="T34"># Spread across availability zones.</text:span></text:p>
          <text:p text:style-name="P30"><text:span text:style-name="T37"><text:s text:c="2"/></text:span><text:span text:style-name="T35">topologySpreadConstraints</text:span><text:span text:style-name="T36">:</text:span></text:p>
          <text:p text:style-name="P30"><text:span text:style-name="T37"><text:s text:c="4"/></text:span><text:span text:style-name="T36">- </text:span><text:span text:style-name="T35">maxSkew</text:span><text:span text:style-name="T36">: </text:span><text:span text:style-name="T38">1</text:span></text:p>
          <text:p text:style-name="P30"><text:span text:style-name="T37"><text:s text:c="6"/></text:span><text:span text:style-name="T35">topologyKey</text:span><text:span text:style-name="T36">: </text:span><text:span text:style-name="T37">topology.kubernetes.io/zone</text:span></text:p>
          <text:p text:style-name="P30"><text:span text:style-name="T37"><text:s text:c="6"/></text:span><text:span text:style-name="T35">whenUnsatisfiable</text:span><text:span text:style-name="T36">: </text:span><text:span text:style-name="T37">DoNotSchedule</text:span></text:p>
          <text:p text:style-name="P30"><text:span text:style-name="T34"><text:s text:c="2"/></text:span><text:span text:style-name="T34"># Tolerate the taint on dedicated DB nodes.</text:span></text:p>
          <text:p text:style-name="P30"><text:span text:style-name="T37"><text:s text:c="2"/></text:span><text:span text:style-name="T35">tolerations</text:span><text:span text:style-name="T36">:</text:span></text:p>
          <text:p text:style-name="P30"><text:span text:style-name="T37"><text:s text:c="4"/></text:span><text:span text:style-name="T36">- </text:span><text:span text:style-name="T35">key</text:span><text:span text:style-name="T36">: </text:span><text:span text:style-name="T41">"mariadb.com/dedicated"</text:span></text:p>
          <text:p text:style-name="P30"><text:span text:style-name="T37"><text:s text:c="6"/></text:span><text:span text:style-name="T35">operator</text:span><text:span text:style-name="T36">: </text:span><text:span text:style-name="T41">"Exists"</text:span></text:p>
          <text:p text:style-name="P30"><text:span text:style-name="T37"><text:s text:c="6"/></text:span><text:span text:style-name="T35">effect</text:span><text:span text:style-name="T36">: </text:span><text:span text:style-name="T41">"NoSchedule"</text:span></text:p>
          <text:p text:style-name="P30"><text:span text:style-name="T34"><text:s text:c="2"/></text:span><text:span text:style-name="T34"># Limit voluntary disruptions.</text:span></text:p>
          <text:p text:style-name="P30"><text:span text:style-name="T37"><text:s text:c="2"/></text:span><text:span text:style-name="T35">podDisruptionBudget</text:span><text:span text:style-name="T36">:</text:span></text:p>
          <text:p text:style-name="P30"><text:span text:style-name="T37"><text:s text:c="4"/></text:span><text:span text:style-name="T35">maxUnavailable</text:span><text:span text:style-name="T36">: </text:span><text:span text:style-name="T41">"1"</text:span></text:p>
          <text:p text:style-name="P30"><text:span text:style-name="T34"><text:s text:c="2"/></text:span><text:span text:style-name="T34"># Prevent eviction under node pressure.</text:span></text:p>
          <text:p text:style-name="P30"><text:span text:style-name="T37"><text:s text:c="2"/></text:span><text:span text:style-name="T35">priorityClassName</text:span><text:span text:style-name="T36">: </text:span><text:span text:style-name="T37">system-node-critical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9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Dedicated nodes + anti-affinity + zone spread is the gold standard. This prevents noisy-neighbour interference and ensures true HA across failure domain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99" draw:text-style-name="P18" draw:layer="layout" svg:width="2.285cm" svg:height="0.71cm" svg:x="1.143cm" svg:y="0.559cm">
          <text:p text:style-name="P17"><text:span text:style-name="T29">DAY 1 · 5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0" draw:text-style-name="P5" draw:layer="layout" svg:width="11.683cm" svg:height="1.218cm" svg:x="1.143cm" svg:y="1.422cm">
          <text:p text:style-name="P4"><text:span text:style-name="T30">T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1" draw:text-style-name="P5" draw:layer="layout" svg:width="11.683cm" svg:height="0.659cm" svg:x="1.143cm" svg:y="2.591cm">
          <text:p text:style-name="P4"><text:span text:style-name="T31">Encrypted connections by de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02" draw:text-style-name="P5" draw:layer="layout" svg:width="11.175cm" svg:height="1.117cm" svg:x="1.6cm" svg:y="3.505cm">
          <text:p text:style-name="P4"><text:span text:style-name="T32">tls.enabled: </text:span><text:span text:style-name="T33">operator auto-issues CA + server + client c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03" draw:text-style-name="P5" draw:layer="layout" svg:width="11.175cm" svg:height="1.117cm" svg:x="1.6cm" svg:y="4.826cm">
          <text:p text:style-name="P4"><text:span text:style-name="T32">tls.required: </text:span><text:span text:style-name="T33">reject all non-TLS connections for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04" draw:text-style-name="P5" draw:layer="layout" svg:width="11.175cm" svg:height="1.117cm" svg:x="1.6cm" svg:y="6.147cm">
          <text:p text:style-name="P4"><text:span text:style-name="T32">cert-manager: </text:span><text:span text:style-name="T33">delegate issuance to a ClusterIssuer if prefer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05" draw:text-style-name="P5" draw:layer="layout" svg:width="11.175cm" svg:height="1.117cm" svg:x="1.6cm" svg:y="7.468cm">
          <text:p text:style-name="P4"><text:span text:style-name="T32">Bring your own CA: </text:span><text:span text:style-name="T33">provide the CA keypair in a Sec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06" draw:text-style-name="P5" draw:layer="layout" svg:width="11.175cm" svg:height="1.117cm" svg:x="1.6cm" svg:y="8.788cm">
          <text:p text:style-name="P4"><text:span text:style-name="T33">Auto-renewal — operator rotates certs before expiry without dow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1" draw:layer="layout" svg:width="10.87cm" svg:height="11.886cm" svg:x="13.665cm" svg:y="1.524cm"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tls</text:span><text:span text:style-name="T36">:</text:span></text:p>
          <text:p text:style-name="P30"><text:span text:style-name="T37"><text:s text:c="4"/></text:span><text:span text:style-name="T35">enabled</text:span><text:span text:style-name="T36">: </text:span><text:span text:style-name="T40">true</text:span></text:p>
          <text:p text:style-name="P30"><text:span text:style-name="T34"><text:s text:c="4"/></text:span><text:span text:style-name="T34"># Reject any non-TLS connection attempt.</text:span></text:p>
          <text:p text:style-name="P30"><text:span text:style-name="T37"><text:s text:c="4"/></text:span><text:span text:style-name="T35">required</text:span><text:span text:style-name="T36">: </text:span><text:span text:style-name="T40">true</text:span></text:p>
          <text:p text:style-name="P30"><text:span text:style-name="T37"/></text:p>
          <text:p text:style-name="P30"><text:span text:style-name="T34"><text:s text:c="4"/></text:span><text:span text:style-name="T34"># Option A (default): operator issues and</text:span></text:p>
          <text:p text:style-name="P30"><text:span text:style-name="T34"><text:s text:c="4"/></text:span><text:span text:style-name="T34"># rotates certificates automatically.</text:span></text:p>
          <text:p text:style-name="P30"><text:span text:style-name="T37"/></text:p>
          <text:p text:style-name="P30"><text:span text:style-name="T34"><text:s text:c="4"/></text:span><text:span text:style-name="T34"># Option B: delegate issuance to cert-manager.</text:span></text:p>
          <text:p text:style-name="P30"><text:span text:style-name="T37"><text:s text:c="4"/></text:span><text:span text:style-name="T35">serverCertIssuerRef</text:span><text:span text:style-name="T36">:</text:span></text:p>
          <text:p text:style-name="P30"><text:span text:style-name="T37"><text:s text:c="6"/></text:span><text:span text:style-name="T35">name</text:span><text:span text:style-name="T36">: </text:span><text:span text:style-name="T37">root-ca</text:span></text:p>
          <text:p text:style-name="P30"><text:span text:style-name="T37"><text:s text:c="6"/></text:span><text:span text:style-name="T35">kind</text:span><text:span text:style-name="T36">: </text:span><text:span text:style-name="T37">ClusterIssuer</text:span></text:p>
          <text:p text:style-name="P30"><text:span text:style-name="T37"><text:s text:c="4"/></text:span><text:span text:style-name="T35">clientCertIssuerRef</text:span><text:span text:style-name="T36">:</text:span></text:p>
          <text:p text:style-name="P30"><text:span text:style-name="T37"><text:s text:c="6"/></text:span><text:span text:style-name="T35">name</text:span><text:span text:style-name="T36">: </text:span><text:span text:style-name="T37">root-ca</text:span></text:p>
          <text:p text:style-name="P30"><text:span text:style-name="T37"><text:s text:c="6"/></text:span><text:span text:style-name="T35">kind</text:span><text:span text:style-name="T36">: </text:span><text:span text:style-name="T37">ClusterIssuer</text:span></text:p>
          <text:p text:style-name="P30"><text:span text:style-name="T37"/></text:p>
          <text:p text:style-name="P30"><text:span text:style-name="T34"><text:s text:c="4"/></text:span><text:span text:style-name="T34"># Option C: bring your own CA stored</text:span></text:p>
          <text:p text:style-name="P30"><text:span text:style-name="T34"><text:s text:c="4"/></text:span><text:span text:style-name="T34"># in a Kubernetes Secret.</text:span></text:p>
          <text:p text:style-name="P30"><text:span text:style-name="T37"><text:s text:c="4"/></text:span><text:span text:style-name="T35">serverCASecretRef</text:span><text:span text:style-name="T36">:</text:span></text:p>
          <text:p text:style-name="P30"><text:span text:style-name="T37"><text:s text:c="6"/></text:span><text:span text:style-name="T35">name</text:span><text:span text:style-name="T36">: </text:span><text:span text:style-name="T37">mariadb-server-ca</text:span></text:p>
          <text:p text:style-name="P30"><text:span text:style-name="T37"><text:s text:c="4"/></text:span><text:span text:style-name="T35">clientCASecretRef</text:span><text:span text:style-name="T36">:</text:span></text:p>
          <text:p text:style-name="P30"><text:span text:style-name="T37"><text:s text:c="6"/></text:span><text:span text:style-name="T35">name</text:span><text:span text:style-name="T36">: </text:span><text:span text:style-name="T37">mariadb-client-ca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0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LS is enabled by default. For production always set required: true. The operator handles cert rotation automatically — zero downtime, zero manual intervention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07" draw:text-style-name="P18" draw:layer="layout" svg:width="2.285cm" svg:height="0.71cm" svg:x="1.143cm" svg:y="0.559cm">
          <text:p text:style-name="P17"><text:span text:style-name="T29">DAY 1 · 6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8" draw:text-style-name="P5" draw:layer="layout" svg:width="11.683cm" svg:height="1.218cm" svg:x="1.143cm" svg:y="1.422cm">
          <text:p text:style-name="P4"><text:span text:style-name="T30">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9" draw:text-style-name="P5" draw:layer="layout" svg:width="11.683cm" svg:height="0.659cm" svg:x="1.143cm" svg:y="2.591cm">
          <text:p text:style-name="P4"><text:span text:style-name="T31">Prometheus-native observ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10" draw:text-style-name="P5" draw:layer="layout" svg:width="11.175cm" svg:height="1.117cm" svg:x="1.6cm" svg:y="3.505cm">
          <text:p text:style-name="P4"><text:span text:style-name="T32">metrics.enabled: </text:span><text:span text:style-name="T33">single flag — operator provisions every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11" draw:text-style-name="P5" draw:layer="layout" svg:width="11.175cm" svg:height="1.117cm" svg:x="1.6cm" svg:y="4.826cm">
          <text:p text:style-name="P4"><text:span text:style-name="T32">Multi-target exporter: </text:span><text:span text:style-name="T33">one Deployment scrapes all replicas, no sidec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12" draw:text-style-name="P5" draw:layer="layout" svg:width="11.175cm" svg:height="1.117cm" svg:x="1.6cm" svg:y="6.147cm">
          <text:p text:style-name="P4"><text:span text:style-name="T32">ServiceMonitor: </text:span><text:span text:style-name="T33">auto-created for prometheus-operator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13" draw:text-style-name="P5" draw:layer="layout" svg:width="11.175cm" svg:height="1.117cm" svg:x="1.6cm" svg:y="7.468cm">
          <text:p text:style-name="P4"><text:span text:style-name="T32">Credentials: </text:span><text:span text:style-name="T33">monitoring user + password managed by the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14" draw:text-style-name="P5" draw:layer="layout" svg:width="11.175cm" svg:height="1.117cm" svg:x="1.6cm" svg:y="8.788cm">
          <text:p text:style-name="P4"><text:span text:style-name="T32">scrapeTimeout: </text:span><text:span text:style-name="T33">tune interval and timeout to match your Prometheus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1" draw:layer="layout" svg:width="10.87cm" svg:height="11.886cm" svg:x="13.665cm" svg:y="1.524cm"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metrics</text:span><text:span text:style-name="T36">:</text:span></text:p>
          <text:p text:style-name="P30"><text:span text:style-name="T37"><text:s text:c="4"/></text:span><text:span text:style-name="T35">enabled</text:span><text:span text:style-name="T36">: </text:span><text:span text:style-name="T40">true</text:span></text:p>
          <text:p text:style-name="P30"><text:span text:style-name="T34"><text:s text:c="4"/></text:span><text:span text:style-name="T34"># Operator provisions a multi-target</text:span></text:p>
          <text:p text:style-name="P30"><text:span text:style-name="T34"><text:s text:c="4"/></text:span><text:span text:style-name="T34"># Prometheus exporter — no sidecars.</text:span></text:p>
          <text:p text:style-name="P30"><text:span text:style-name="T37"><text:s text:c="4"/></text:span><text:span text:style-name="T35">exporter</text:span><text:span text:style-name="T36">:</text:span></text:p>
          <text:p text:style-name="P30"><text:span text:style-name="T37"><text:s text:c="6"/></text:span><text:span text:style-name="T35">resources</text:span><text:span text:style-name="T36">:</text:span></text:p>
          <text:p text:style-name="P30"><text:span text:style-name="T37"><text:s text:c="8"/></text:span><text:span text:style-name="T35">requests</text:span><text:span text:style-name="T36">:</text:span></text:p>
          <text:p text:style-name="P30"><text:span text:style-name="T37"><text:s text:c="10"/></text:span><text:span text:style-name="T35">cpu</text:span><text:span text:style-name="T36">: </text:span><text:span text:style-name="T38">50m</text:span></text:p>
          <text:p text:style-name="P30"><text:span text:style-name="T37"><text:s text:c="10"/></text:span><text:span text:style-name="T35">memory</text:span><text:span text:style-name="T36">: </text:span><text:span text:style-name="T38">64Mi</text:span></text:p>
          <text:p text:style-name="P30"><text:span text:style-name="T37"><text:s text:c="8"/></text:span><text:span text:style-name="T35">limits</text:span><text:span text:style-name="T36">:</text:span></text:p>
          <text:p text:style-name="P30"><text:span text:style-name="T37"><text:s text:c="10"/></text:span><text:span text:style-name="T35">memory</text:span><text:span text:style-name="T36">: </text:span><text:span text:style-name="T38">512Mi</text:span></text:p>
          <text:p text:style-name="P30"><text:span text:style-name="T34"><text:s text:c="4"/></text:span><text:span text:style-name="T34"># Operator manages credentials automatically.</text:span></text:p>
          <text:p text:style-name="P30"><text:span text:style-name="T37"><text:s text:c="4"/></text:span><text:span text:style-name="T35">username</text:span><text:span text:style-name="T36">: </text:span><text:span text:style-name="T37">monitoring</text:span></text:p>
          <text:p text:style-name="P30"><text:span text:style-name="T37"><text:s text:c="4"/></text:span><text:span text:style-name="T35">passwordSecretKeyRef</text:span><text:span text:style-name="T36">:</text:span></text:p>
          <text:p text:style-name="P30"><text:span text:style-name="T37"><text:s text:c="6"/></text:span><text:span text:style-name="T35">name</text:span><text:span text:style-name="T36">: </text:span><text:span text:style-name="T37">mariadb</text:span></text:p>
          <text:p text:style-name="P30"><text:span text:style-name="T37"><text:s text:c="6"/></text:span><text:span text:style-name="T35">key</text:span><text:span text:style-name="T36">: </text:span><text:span text:style-name="T37">password</text:span></text:p>
          <text:p text:style-name="P30"><text:span text:style-name="T34"><text:s text:c="4"/></text:span><text:span text:style-name="T34"># Auto-registers metrics in Prometheus.</text:span></text:p>
          <text:p text:style-name="P30"><text:span text:style-name="T37"><text:s text:c="4"/></text:span><text:span text:style-name="T35">serviceMonitor</text:span><text:span text:style-name="T36">:</text:span></text:p>
          <text:p text:style-name="P30"><text:span text:style-name="T37"><text:s text:c="6"/></text:span><text:span text:style-name="T35">interval</text:span><text:span text:style-name="T36">: </text:span><text:span text:style-name="T38">10s</text:span></text:p>
          <text:p text:style-name="P30"><text:span text:style-name="T37"><text:s text:c="6"/></text:span><text:span text:style-name="T35">scrapeTimeout</text:span><text:span text:style-name="T36">: </text:span><text:span text:style-name="T38">10s</text:span></text:p>
          <text:p text:style-name="P4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1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Day 1 done. Cluster is provisioned, storage configured, compute right-sized, pods scheduled across zones, TLS enforced, and Prometheus is scraping. Now let's talk Day 2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58" draw:text-style-name="P24" draw:layer="layout" svg:width="15.239cm" svg:height="15.239cm" svg:x="16.51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4" draw:text-style-name="P22" draw:layer="layout" svg:width="10.159cm" svg:height="10.159cm" svg:x="-3.81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27" draw:text-style-name="P8" draw:layer="layout" svg:width="3.301cm" svg:height="0.964cm" svg:x="1.397cm" svg:y="4.064cm">
          <text:p/>
          <draw:enhanced-geometry draw:mirror-horizontal="false" draw:mirror-vertical="false" svg:viewBox="0 0 0 0" draw:text-areas="?f5 ?f5 ?f6 ?f7" draw:type="ooxml-roundRect" draw:modifiers="210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115" draw:text-style-name="P18" draw:layer="layout" svg:width="3.301cm" svg:height="0.964cm" svg:x="1.397cm" svg:y="4.064cm">
          <text:p text:style-name="P17"><text:span text:style-name="T26">DAY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6" draw:text-style-name="P5" draw:layer="layout" svg:width="19.049cm" svg:height="1.828cm" svg:x="1.397cm" svg:y="5.334cm">
          <text:p text:style-name="P4"><text:span text:style-name="T27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7" draw:text-style-name="P5" draw:layer="layout" svg:width="19.049cm" svg:height="0.888cm" svg:x="1.397cm" svg:y="7.366cm">
          <text:p text:style-name="P4"><text:span text:style-name="T28">Backup, recovery, updates, and maintenance — all declar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62" draw:text-style-name="P3" draw:layer="layout" svg:x1="1.397cm" svg:y1="8.509cm" svg:x2="12.827cm" svg:y2="8.51cm">
          <text:p/>
        </draw:line>
        <presentation:notes draw:style-name="dp2">
          <draw:page-thumbnail draw:name="Slide Image Placeholder 1" draw:style-name="gr11" draw:layer="layout" svg:width="15.239cm" svg:height="8.572cm" svg:x="1.905cm" svg:y="3.175cm" draw:page-number="12" presentation:class="page"/>
          <draw:frame draw:name="Notes Placeholder 2" presentation:style-name="pr4" draw:text-style-name="P2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18" draw:text-style-name="P18" draw:layer="layout" svg:width="2.285cm" svg:height="0.71cm" svg:x="1.143cm" svg:y="0.559cm">
          <text:p text:style-name="P17"><text:span text:style-name="T29">DAY 2 · 1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9" draw:text-style-name="P5" draw:layer="layout" svg:width="11.683cm" svg:height="1.218cm" svg:x="1.143cm" svg:y="1.422cm">
          <text:p text:style-name="P4"><text:span text:style-name="T30">Physical 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0" draw:text-style-name="P5" draw:layer="layout" svg:width="11.683cm" svg:height="0.659cm" svg:x="1.143cm" svg:y="2.591cm">
          <text:p text:style-name="P4"><text:span text:style-name="T31">Fast, consistent full 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21" draw:text-style-name="P5" draw:layer="layout" svg:width="11.175cm" svg:height="1.117cm" svg:x="1.6cm" svg:y="3.505cm">
          <text:p text:style-name="P4"><text:span text:style-name="T32">mariadb-backup: </text:span><text:span text:style-name="T33">hot backup — zero downtime, taken from a repl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22" draw:text-style-name="P5" draw:layer="layout" svg:width="11.175cm" svg:height="1.117cm" svg:x="1.6cm" svg:y="4.826cm">
          <text:p text:style-name="P4"><text:span text:style-name="T32">VolumeSnapshots: </text:span><text:span text:style-name="T33">Kubernetes-native, near-instant, CSI-driver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23" draw:text-style-name="P5" draw:layer="layout" svg:width="11.175cm" svg:height="1.117cm" svg:x="1.6cm" svg:y="6.147cm">
          <text:p text:style-name="P4"><text:span text:style-name="T32">Storage: </text:span><text:span text:style-name="T33">S3-compatible, Azure Blob, PVC, or Kubernetes volu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24" draw:text-style-name="P5" draw:layer="layout" svg:width="11.175cm" svg:height="1.117cm" svg:x="1.6cm" svg:y="7.468cm">
          <text:p text:style-name="P4"><text:span text:style-name="T32">Scheduling: </text:span><text:span text:style-name="T33">cron expression or on-demand trig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25" draw:text-style-name="P5" draw:layer="layout" svg:width="11.175cm" svg:height="1.117cm" svg:x="1.6cm" svg:y="8.788cm">
          <text:p text:style-name="P4"><text:span text:style-name="T32">onDemand: </text:span><text:span text:style-name="T33">update the identifier field to schedule an immediate backup at any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7" draw:text-style-name="P8" draw:layer="layout" svg:width="0.253cm" svg:height="0.253cm" svg:x="1.143cm" svg:y="10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126" draw:text-style-name="P5" draw:layer="layout" svg:width="11.175cm" svg:height="1.117cm" svg:x="1.6cm" svg:y="10.109cm">
          <text:p text:style-name="P4"><text:span text:style-name="T32">Retention: </text:span><text:span text:style-name="T33">maxRetention auto-cleans old backups (e.g. 720h = 30 day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8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75" draw:text-style-name="P31" draw:layer="layout" svg:width="10.87cm" svg:height="11.886cm" svg:x="13.665cm" svg:y="1.524cm"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PhysicalBackup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physicalbackup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mariaDbRef</text:span><text:span text:style-name="T36">:</text:span></text:p>
          <text:p text:style-name="P30"><text:span text:style-name="T37"><text:s text:c="4"/></text:span><text:span text:style-name="T35">name</text:span><text:span text:style-name="T36">: </text:span><text:span text:style-name="T37">mariadb</text:span></text:p>
          <text:p text:style-name="P30"><text:span text:style-name="T37"><text:s text:c="2"/></text:span><text:span text:style-name="T35">schedule</text:span><text:span text:style-name="T36">:</text:span></text:p>
          <text:p text:style-name="P30"><text:span text:style-name="T37"><text:s text:c="4"/></text:span><text:span text:style-name="T35">cron</text:span><text:span text:style-name="T36">: </text:span><text:span text:style-name="T41">"0 2 * * *" <text:s text:c="5"/># daily at 02:00</text:span></text:p>
          <text:p text:style-name="P30"><text:span text:style-name="T34"><text:s text:c="4"/></text:span><text:span text:style-name="T34"># Update identifier to trigger on-demand:</text:span></text:p>
          <text:p text:style-name="P30"><text:span text:style-name="T37"><text:s text:c="4"/></text:span><text:span text:style-name="T35">onDemand</text:span><text:span text:style-name="T36">: </text:span><text:span text:style-name="T41">"1"</text:span></text:p>
          <text:p text:style-name="P30"><text:span text:style-name="T37"><text:s text:c="2"/></text:span><text:span text:style-name="T35">target</text:span><text:span text:style-name="T36">: </text:span><text:span text:style-name="T37">Replica <text:s text:c="9"/># zero impact on primary</text:span></text:p>
          <text:p text:style-name="P30"><text:span text:style-name="T37"><text:s text:c="2"/></text:span><text:span text:style-name="T35">compression</text:span><text:span text:style-name="T36">: </text:span><text:span text:style-name="T37">bzip2</text:span></text:p>
          <text:p text:style-name="P30"><text:span text:style-name="T37"><text:s text:c="2"/></text:span><text:span text:style-name="T35">maxRetention</text:span><text:span text:style-name="T36">: </text:span><text:span text:style-name="T38">720h <text:s text:c="6"/># 30 days</text:span></text:p>
          <text:p text:style-name="P30"><text:span text:style-name="T37"><text:s text:c="2"/></text:span><text:span text:style-name="T35">storage</text:span><text:span text:style-name="T36">:</text:span></text:p>
          <text:p text:style-name="P30"><text:span text:style-name="T34"><text:s text:c="4"/></text:span><text:span text:style-name="T34"># S3-compatible (AWS S3, MinIO, GCS, …)</text:span></text:p>
          <text:p text:style-name="P30"><text:span text:style-name="T37"><text:s text:c="4"/></text:span><text:span text:style-name="T35">s3</text:span><text:span text:style-name="T36">:</text:span></text:p>
          <text:p text:style-name="P30"><text:span text:style-name="T37"><text:s text:c="6"/></text:span><text:span text:style-name="T35">bucket</text:span><text:span text:style-name="T36">: </text:span><text:span text:style-name="T37">physicalbackups</text:span></text:p>
          <text:p text:style-name="P30"><text:span text:style-name="T37"><text:s text:c="6"/></text:span><text:span text:style-name="T35">prefix</text:span><text:span text:style-name="T36">: </text:span><text:span text:style-name="T37">mariadb</text:span></text:p>
          <text:p text:style-name="P30"><text:span text:style-name="T37"><text:s text:c="6"/></text:span><text:span text:style-name="T35">endpoint</text:span><text:span text:style-name="T36">: </text:span><text:span text:style-name="T37">s3.amazonaws.com</text:span></text:p>
          <text:p text:style-name="P30"><text:span text:style-name="T37"><text:s text:c="6"/></text:span><text:span text:style-name="T35">region</text:span><text:span text:style-name="T36">: </text:span><text:span text:style-name="T37">us-east-1</text:span></text:p>
          <text:p text:style-name="P30"><text:span text:style-name="T37"><text:s text:c="6"/></text:span><text:span text:style-name="T35">accessKeyIdSecretKeyRef</text:span><text:span text:style-name="T36">:</text:span></text:p>
          <text:p text:style-name="P30"><text:span text:style-name="T37"><text:s text:c="8"/></text:span><text:span text:style-name="T35">name</text:span><text:span text:style-name="T36">: </text:span><text:span text:style-name="T37">s3-credentials</text:span></text:p>
          <text:p text:style-name="P30"><text:span text:style-name="T37"><text:s text:c="8"/></text:span><text:span text:style-name="T35">key</text:span><text:span text:style-name="T36">: </text:span><text:span text:style-name="T37">access-key-id</text:span></text:p>
          <text:p text:style-name="P30"><text:span text:style-name="T37"><text:s text:c="6"/></text:span><text:span text:style-name="T35">secretAccessKeySecretKeyRef</text:span><text:span text:style-name="T36">:</text:span></text:p>
          <text:p text:style-name="P30"><text:span text:style-name="T37"><text:s text:c="8"/></text:span><text:span text:style-name="T35">name</text:span><text:span text:style-name="T36">: </text:span><text:span text:style-name="T37">s3-credentials</text:span></text:p>
          <text:p text:style-name="P30"><text:span text:style-name="T37"><text:s text:c="8"/></text:span><text:span text:style-name="T35">key</text:span><text:span text:style-name="T36">: </text:span><text:span text:style-name="T37">secret-access-key</text:span></text:p>
          <text:p text:style-name="P30"><text:span text:style-name="T34"><text:s text:c="4"/></text:span><text:span text:style-name="T34"># azureBlob: { … } <text:s text:c="5"/># Azure Blob Storage</text:span></text:p>
          <text:p text:style-name="P30"><text:span text:style-name="T34"><text:s text:c="4"/></text:span><text:span text:style-name="T34"># volumeSnapshot: { … } # consistent, near-instant</text:span></text:p>
          <text:p text:style-name="P4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3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Physical backups are the foundation of our DR strategy. Taken from a replica so the primary is never impacted. S3 for durability + bzip2 compression for cost efficiency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27" draw:text-style-name="P18" draw:layer="layout" svg:width="2.285cm" svg:height="0.71cm" svg:x="1.143cm" svg:y="0.559cm">
          <text:p text:style-name="P17"><text:span text:style-name="T29">DAY 2 · 2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8" draw:text-style-name="P5" draw:layer="layout" svg:width="11.683cm" svg:height="1.218cm" svg:x="1.143cm" svg:y="1.422cm">
          <text:p text:style-name="P4"><text:span text:style-name="T30">Point-In-Time Re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9" draw:text-style-name="P5" draw:layer="layout" svg:width="11.683cm" svg:height="0.659cm" svg:x="1.143cm" svg:y="2.591cm">
          <text:p text:style-name="P4"><text:span text:style-name="T31">Restore to any second in hi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30" draw:text-style-name="P5" draw:layer="layout" svg:width="11.175cm" svg:height="1.117cm" svg:x="1.6cm" svg:y="3.505cm">
          <text:p text:style-name="P4"><text:span text:style-name="T32">Binary log archival: </text:span><text:span text:style-name="T33">agent sidecar continuously streams binlogs to 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31" draw:text-style-name="P5" draw:layer="layout" svg:width="11.175cm" svg:height="1.117cm" svg:x="1.6cm" svg:y="4.826cm">
          <text:p text:style-name="P4"><text:span text:style-name="T32">Base backup + binlogs: </text:span><text:span text:style-name="T33">PITR = restore physical backup then replay lo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32" draw:text-style-name="P5" draw:layer="layout" svg:width="11.175cm" svg:height="1.117cm" svg:x="1.6cm" svg:y="6.147cm">
          <text:p text:style-name="P4"><text:span text:style-name="T32">targetRecoveryTime: </text:span><text:span text:style-name="T33">RFC3339 timestamp — operator finds the right bac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33" draw:text-style-name="P5" draw:layer="layout" svg:width="11.175cm" svg:height="1.117cm" svg:x="1.6cm" svg:y="7.468cm">
          <text:p text:style-name="P4"><text:span text:style-name="T32">Last recoverable time: </text:span><text:span text:style-name="T33">visible in PointInTimeRecovery status — drives R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34" draw:text-style-name="P5" draw:layer="layout" svg:width="11.175cm" svg:height="1.117cm" svg:x="1.6cm" svg:y="8.788cm">
          <text:p text:style-name="P4"><text:span text:style-name="T33">MariaDB 10.8+ required · Replication 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1" draw:layer="layout" svg:width="10.87cm" svg:height="11.886cm" svg:x="13.665cm" svg:y="1.524cm"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PointInTimeRecovery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pitr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physicalBackupRef</text:span><text:span text:style-name="T36">:</text:span></text:p>
          <text:p text:style-name="P30"><text:span text:style-name="T37"><text:s text:c="4"/></text:span><text:span text:style-name="T35">name</text:span><text:span text:style-name="T36">: </text:span><text:span text:style-name="T37">physicalbackup</text:span></text:p>
          <text:p text:style-name="P30"><text:span text:style-name="T37"><text:s text:c="2"/></text:span><text:span text:style-name="T35">archiveTimeout</text:span><text:span text:style-name="T36">: </text:span><text:span text:style-name="T38">5m</text:span></text:p>
          <text:p text:style-name="P30"><text:span text:style-name="T37"><text:s text:c="2"/></text:span><text:span text:style-name="T35">storage</text:span><text:span text:style-name="T36">:</text:span></text:p>
          <text:p text:style-name="P30"><text:span text:style-name="T37"><text:s text:c="4"/></text:span><text:span text:style-name="T35">s3</text:span><text:span text:style-name="T36">:</text:span></text:p>
          <text:p text:style-name="P30"><text:span text:style-name="T37"><text:s text:c="6"/></text:span><text:span text:style-name="T35">bucket</text:span><text:span text:style-name="T36">: </text:span><text:span text:style-name="T37">binlogs</text:span></text:p>
          <text:p text:style-name="P30"><text:span text:style-name="T37"><text:s text:c="6"/></text:span><text:span text:style-name="T35">endpoint</text:span><text:span text:style-name="T36">: </text:span><text:span text:style-name="T37">s3.amazonaws.com</text:span></text:p>
          <text:p text:style-name="P30"><text:span text:style-name="T37"><text:s text:c="6"/></text:span><text:span text:style-name="T35">accessKeyIdSecretKeyRef</text:span><text:span text:style-name="T36">:</text:span></text:p>
          <text:p text:style-name="P30"><text:span text:style-name="T37"><text:s text:c="8"/></text:span><text:span text:style-name="T35">name</text:span><text:span text:style-name="T36">: </text:span><text:span text:style-name="T37">s3-credentials</text:span></text:p>
          <text:p text:style-name="P30"><text:span text:style-name="T37"><text:s text:c="8"/></text:span><text:span text:style-name="T35">key</text:span><text:span text:style-name="T36">: </text:span><text:span text:style-name="T37">access-key-id</text:span></text:p>
          <text:p text:style-name="P30"><text:span text:style-name="T37"><text:s text:c="6"/></text:span><text:span text:style-name="T35">secretAccessKeySecretKeyRef</text:span><text:span text:style-name="T36">:</text:span></text:p>
          <text:p text:style-name="P30"><text:span text:style-name="T37"><text:s text:c="8"/></text:span><text:span text:style-name="T35">name</text:span><text:span text:style-name="T36">: </text:span><text:span text:style-name="T37">s3-credentials</text:span></text:p>
          <text:p text:style-name="P30"><text:span text:style-name="T37"><text:s text:c="8"/></text:span><text:span text:style-name="T35">key</text:span><text:span text:style-name="T36">: </text:span><text:span text:style-name="T37">secret-access-key</text:span></text:p>
          <text:p text:style-name="P30"><text:span text:style-name="T39">---</text:span></text:p>
          <text:p text:style-name="P30"><text:span text:style-name="T34"># Restore to a specific point in time: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bootstrapFrom</text:span><text:span text:style-name="T36">:</text:span></text:p>
          <text:p text:style-name="P30"><text:span text:style-name="T37"><text:s text:c="4"/></text:span><text:span text:style-name="T35">pointInTimeRecoveryRef</text:span><text:span text:style-name="T36">:</text:span></text:p>
          <text:p text:style-name="P30"><text:span text:style-name="T37"><text:s text:c="6"/></text:span><text:span text:style-name="T35">name</text:span><text:span text:style-name="T36">: </text:span><text:span text:style-name="T37">pitr</text:span></text:p>
          <text:p text:style-name="P30"><text:span text:style-name="T37"><text:s text:c="4"/></text:span><text:span text:style-name="T35">targetRecoveryTime</text:span><text:span text:style-name="T36">: </text:span><text:span text:style-name="T41">"2025-06-18T14:37:52Z"</text:span></text:p>
          <text:p text:style-name="P4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4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ith PITR our RPO can drop to minutes. The operator handles everything: archiving binlogs, finding the right base backup, and replaying logs up to the target time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35" draw:text-style-name="P18" draw:layer="layout" svg:width="2.285cm" svg:height="0.71cm" svg:x="1.143cm" svg:y="0.559cm">
          <text:p text:style-name="P17"><text:span text:style-name="T29">DAY 2 · 3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6" draw:text-style-name="P5" draw:layer="layout" svg:width="11.683cm" svg:height="1.218cm" svg:x="1.143cm" svg:y="1.422cm">
          <text:p text:style-name="P4"><text:span text:style-name="T30">Restore &amp; 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7" draw:text-style-name="P5" draw:layer="layout" svg:width="11.683cm" svg:height="0.659cm" svg:x="1.143cm" svg:y="2.591cm">
          <text:p text:style-name="P4"><text:span text:style-name="T31">Spin up new clusters from exis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38" draw:text-style-name="P5" draw:layer="layout" svg:width="11.175cm" svg:height="1.117cm" svg:x="1.6cm" svg:y="3.505cm">
          <text:p text:style-name="P4"><text:span text:style-name="T32">bootstrapFrom: </text:span><text:span text:style-name="T33">declare the restore source directly in the MariaDB C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39" draw:text-style-name="P5" draw:layer="layout" svg:width="11.175cm" svg:height="1.117cm" svg:x="1.6cm" svg:y="4.826cm">
          <text:p text:style-name="P4"><text:span text:style-name="T32">PhysicalBackup ref: </text:span><text:span text:style-name="T33">restore from the closest backup before targetRecovery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0" draw:text-style-name="P5" draw:layer="layout" svg:width="11.175cm" svg:height="1.117cm" svg:x="1.6cm" svg:y="6.147cm">
          <text:p text:style-name="P4"><text:span text:style-name="T32">PITR: </text:span><text:span text:style-name="T33">combine physical backup + binlog replay for point-in-time rest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41" draw:text-style-name="P5" draw:layer="layout" svg:width="11.175cm" svg:height="1.117cm" svg:x="1.6cm" svg:y="7.468cm">
          <text:p text:style-name="P4"><text:span text:style-name="T33">Operator pauses failover operations while restore is 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42" draw:text-style-name="P5" draw:layer="layout" svg:width="11.175cm" svg:height="1.117cm" svg:x="1.6cm" svg:y="8.788cm">
          <text:p text:style-name="P4"><text:span text:style-name="T33">Staging storage PVC avoids exhausting node disk for large 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1" draw:layer="layout" svg:width="10.87cm" svg:height="11.886cm" svg:x="13.665cm" svg:y="1.524cm"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replicas</text:span><text:span text:style-name="T36">: </text:span><text:span text:style-name="T38">3</text:span></text:p>
          <text:p text:style-name="P30"><text:span text:style-name="T37"><text:s text:c="2"/></text:span><text:span text:style-name="T35">replication</text:span><text:span text:style-name="T36">:</text:span></text:p>
          <text:p text:style-name="P30"><text:span text:style-name="T37"><text:s text:c="4"/></text:span><text:span text:style-name="T35">enabled</text:span><text:span text:style-name="T36">: </text:span><text:span text:style-name="T40">true</text:span></text:p>
          <text:p text:style-name="P30"><text:span text:style-name="T37"/></text:p>
          <text:p text:style-name="P30"><text:span text:style-name="T37"><text:s text:c="2"/></text:span><text:span text:style-name="T35">bootstrapFrom</text:span><text:span text:style-name="T36">:</text:span></text:p>
          <text:p text:style-name="P30"><text:span text:style-name="T34"><text:s text:c="4"/></text:span><text:span text:style-name="T34"># A) Restore closest PhysicalBackup.</text:span></text:p>
          <text:p text:style-name="P30"><text:span text:style-name="T37"><text:s text:c="4"/></text:span><text:span text:style-name="T35">backupRef</text:span><text:span text:style-name="T36">:</text:span></text:p>
          <text:p text:style-name="P30"><text:span text:style-name="T37"><text:s text:c="6"/></text:span><text:span text:style-name="T35">name</text:span><text:span text:style-name="T36">: </text:span><text:span text:style-name="T37">physicalbackup</text:span></text:p>
          <text:p text:style-name="P30"><text:span text:style-name="T37"><text:s text:c="6"/></text:span><text:span text:style-name="T35">kind</text:span><text:span text:style-name="T36">: </text:span><text:span text:style-name="T37">PhysicalBackup</text:span></text:p>
          <text:p text:style-name="P30"><text:span text:style-name="T37"/></text:p>
          <text:p text:style-name="P30"><text:span text:style-name="T34"><text:s text:c="4"/></text:span><text:span text:style-name="T34"># B) PITR — restore base backup then</text:span></text:p>
          <text:p text:style-name="P30"><text:span text:style-name="T34"><text:s text:c="4"/></text:span><text:span text:style-name="T34"># replay binlogs up to targetRecoveryTime.</text:span></text:p>
          <text:p text:style-name="P30"><text:span text:style-name="T37"><text:s text:c="4"/></text:span><text:span text:style-name="T35">pointInTimeRecoveryRef</text:span><text:span text:style-name="T36">:</text:span></text:p>
          <text:p text:style-name="P30"><text:span text:style-name="T37"><text:s text:c="6"/></text:span><text:span text:style-name="T35">name</text:span><text:span text:style-name="T36">: </text:span><text:span text:style-name="T37">pitr</text:span></text:p>
          <text:p text:style-name="P30"><text:span text:style-name="T37"><text:s text:c="4"/></text:span><text:span text:style-name="T35">targetRecoveryTime</text:span><text:span text:style-name="T36">: </text:span><text:span text:style-name="T41">"2025-06-18T14:37:52Z"</text:span></text:p>
          <text:p text:style-name="P30"><text:span text:style-name="T37"/></text:p>
          <text:p text:style-name="P30"><text:span text:style-name="T37"><text:s text:c="4"/></text:span><text:span text:style-name="T35">stagingStorage</text:span><text:span text:style-name="T36">:</text:span></text:p>
          <text:p text:style-name="P30"><text:span text:style-name="T37"><text:s text:c="6"/></text:span><text:span text:style-name="T35">persistentVolumeClaim</text:span><text:span text:style-name="T36">:</text:span></text:p>
          <text:p text:style-name="P30"><text:span text:style-name="T37"><text:s text:c="8"/></text:span><text:span text:style-name="T35">resources</text:span><text:span text:style-name="T36">:</text:span></text:p>
          <text:p text:style-name="P30"><text:span text:style-name="T37"><text:s text:c="10"/></text:span><text:span text:style-name="T35">requests</text:span><text:span text:style-name="T36">:</text:span></text:p>
          <text:p text:style-name="P30"><text:span text:style-name="T37"><text:s text:c="12"/></text:span><text:span text:style-name="T35">storage</text:span><text:span text:style-name="T36">: </text:span><text:span text:style-name="T38">100Gi</text:span></text:p>
          <text:p text:style-name="P30"><text:span text:style-name="T37"><text:s text:c="8"/></text:span><text:span text:style-name="T35">accessModes</text:span><text:span text:style-name="T36">:</text:span></text:p>
          <text:p text:style-name="P30"><text:span text:style-name="T37"><text:s text:c="10"/></text:span><text:span text:style-name="T37">ReadWriteOnce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5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his is how we recover. bootstrapFrom works identically for a fresh cluster, a disaster recovery clone, or a PITR restore. One CRD, all scenario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43" draw:text-style-name="P18" draw:layer="layout" svg:width="2.285cm" svg:height="0.71cm" svg:x="1.143cm" svg:y="0.559cm">
          <text:p text:style-name="P17"><text:span text:style-name="T29">DAY 2 · 4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4" draw:text-style-name="P5" draw:layer="layout" svg:width="11.683cm" svg:height="1.218cm" svg:x="1.143cm" svg:y="1.422cm">
          <text:p text:style-name="P4"><text:span text:style-name="T30">Up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5" draw:text-style-name="P5" draw:layer="layout" svg:width="11.683cm" svg:height="0.659cm" svg:x="1.143cm" svg:y="2.591cm">
          <text:p text:style-name="P4"><text:span text:style-name="T31">Zero-downtime rolling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46" draw:text-style-name="P5" draw:layer="layout" svg:width="11.175cm" svg:height="1.117cm" svg:x="1.6cm" svg:y="3.505cm">
          <text:p text:style-name="P4"><text:span text:style-name="T32">ReplicasFirstPrimaryLast: </text:span><text:span text:style-name="T33">roll replicas one-by-one, primary last — de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47" draw:text-style-name="P5" draw:layer="layout" svg:width="11.175cm" svg:height="1.117cm" svg:x="1.6cm" svg:y="4.826cm">
          <text:p text:style-name="P4"><text:span text:style-name="T32">Never: </text:span><text:span text:style-name="T33">freeze updates — useful during maintenance windows or staged roll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8" draw:text-style-name="P5" draw:layer="layout" svg:width="11.175cm" svg:height="1.117cm" svg:x="1.6cm" svg:y="6.147cm">
          <text:p text:style-name="P4"><text:span text:style-name="T32">OnDelete: </text:span><text:span text:style-name="T33">full manual control — delete a pod to trigger its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49" draw:text-style-name="P5" draw:layer="layout" svg:width="11.175cm" svg:height="1.117cm" svg:x="1.6cm" svg:y="7.468cm">
          <text:p text:style-name="P4"><text:span text:style-name="T32">autoUpdateDataPlane: </text:span><text:span text:style-name="T33">automatically updates operator init container and sidecar images to match the operator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4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75" draw:text-style-name="P31" draw:layer="layout" svg:width="10.87cm" svg:height="11.886cm" svg:x="13.665cm" svg:y="1.524cm">
          <text:p text:style-name="P30"><text:span text:style-name="T34"># Default rolling strategy: replicas first,</text:span></text:p>
          <text:p text:style-name="P30"><text:span text:style-name="T34"># then the primary. Minimises disruption.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updateStrategy</text:span><text:span text:style-name="T36">:</text:span></text:p>
          <text:p text:style-name="P30"><text:span text:style-name="T37"><text:s text:c="4"/></text:span><text:span text:style-name="T35">type</text:span><text:span text:style-name="T36">: </text:span><text:span text:style-name="T37">ReplicasFirstPrimaryLast</text:span></text:p>
          <text:p text:style-name="P30"><text:span text:style-name="T37"><text:s text:c="4"/></text:span><text:span text:style-name="T35">autoUpdateDataPlane</text:span><text:span text:style-name="T36">: </text:span><text:span text:style-name="T40">true</text:span></text:p>
          <text:p text:style-name="P30"><text:span text:style-name="T39">---</text:span></text:p>
          <text:p text:style-name="P30"><text:span text:style-name="T34"># Pause all automatic image updates during</text:span></text:p>
          <text:p text:style-name="P30"><text:span text:style-name="T34"># a maintenance freeze or staged rollout.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updateStrategy</text:span><text:span text:style-name="T36">:</text:span></text:p>
          <text:p text:style-name="P30"><text:span text:style-name="T37"><text:s text:c="4"/></text:span><text:span text:style-name="T35">type</text:span><text:span text:style-name="T36">: </text:span><text:span text:style-name="T37">Never</text:span></text:p>
          <text:p text:style-name="P30"><text:span text:style-name="T39">---</text:span></text:p>
          <text:p text:style-name="P30"><text:span text:style-name="T34"># Full manual control: delete a Pod to</text:span></text:p>
          <text:p text:style-name="P30"><text:span text:style-name="T34"># trigger its individual update.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updateStrategy</text:span><text:span text:style-name="T36">:</text:span></text:p>
          <text:p text:style-name="P30"><text:span text:style-name="T37"><text:s text:c="4"/></text:span><text:span text:style-name="T35">type</text:span><text:span text:style-name="T36">: </text:span><text:span text:style-name="T37">OnDelete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6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ReplicasFirstPrimaryLast is designed for MariaDB — it's role-aware. If the new image fails on a replica we pause before touching the primary, protecting write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50" draw:text-style-name="P18" draw:layer="layout" svg:width="2.285cm" svg:height="0.71cm" svg:x="1.143cm" svg:y="0.559cm">
          <text:p text:style-name="P17"><text:span text:style-name="T29">DAY 2 · 5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1" draw:text-style-name="P5" draw:layer="layout" svg:width="11.683cm" svg:height="1.218cm" svg:x="1.143cm" svg:y="1.422cm">
          <text:p text:style-name="P4"><text:span text:style-name="T30">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2" draw:text-style-name="P5" draw:layer="layout" svg:width="11.683cm" svg:height="0.659cm" svg:x="1.143cm" svg:y="2.591cm">
          <text:p text:style-name="P4"><text:span text:style-name="T31">Live my.cnf changes without manual resta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53" draw:text-style-name="P5" draw:layer="layout" svg:width="11.175cm" svg:height="1.117cm" svg:x="1.6cm" svg:y="3.505cm">
          <text:p text:style-name="P4"><text:span text:style-name="T32">myCnf inline: </text:span><text:span text:style-name="T33">changes trigger a rolling update automatic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54" draw:text-style-name="P5" draw:layer="layout" svg:width="11.175cm" svg:height="1.117cm" svg:x="1.6cm" svg:y="4.826cm">
          <text:p text:style-name="P4"><text:span text:style-name="T32">ConfigMap ref: </text:span><text:span text:style-name="T33">label it k8s.mariadb.com/watch — operator detects ed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55" draw:text-style-name="P5" draw:layer="layout" svg:width="11.175cm" svg:height="1.117cm" svg:x="1.6cm" svg:y="6.147cm">
          <text:p text:style-name="P4"><text:span text:style-name="T32">Typical tuning: </text:span><text:span text:style-name="T33">innodb_buffer_pool_size, max_connections, binlog set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56" draw:text-style-name="P5" draw:layer="layout" svg:width="11.175cm" svg:height="1.117cm" svg:x="1.6cm" svg:y="7.468cm">
          <text:p text:style-name="P4"><text:span text:style-name="T33">GitOps-friendly: commit the ConfigMap, CI applies it, operator re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4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75" draw:text-style-name="P31" draw:layer="layout" svg:width="10.87cm" svg:height="11.886cm" svg:x="13.665cm" svg:y="1.524cm">
          <text:p text:style-name="P30"><text:span text:style-name="T34"># Label the ConfigMap with</text:span></text:p>
          <text:p text:style-name="P30"><text:span text:style-name="T34"># k8s.mariadb.com/watch — any edit</text:span></text:p>
          <text:p text:style-name="P30"><text:span text:style-name="T34"># triggers a rolling update.</text:span></text:p>
          <text:p text:style-name="P30"><text:span text:style-name="T35">apiVersion</text:span><text:span text:style-name="T36">: </text:span><text:span text:style-name="T37">v1</text:span></text:p>
          <text:p text:style-name="P30"><text:span text:style-name="T35">kind</text:span><text:span text:style-name="T36">: </text:span><text:span text:style-name="T37">ConfigMap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mariadb-config</text:span></text:p>
          <text:p text:style-name="P30"><text:span text:style-name="T37"><text:s text:c="2"/></text:span><text:span text:style-name="T35">labels</text:span><text:span text:style-name="T36">:</text:span></text:p>
          <text:p text:style-name="P30"><text:span text:style-name="T37"><text:s text:c="4"/></text:span><text:span text:style-name="T35">k8s.mariadb.com/watch</text:span><text:span text:style-name="T36">: </text:span><text:span text:style-name="T41">""</text:span></text:p>
          <text:p text:style-name="P30"><text:span text:style-name="T35">data</text:span><text:span text:style-name="T36">:</text:span></text:p>
          <text:p text:style-name="P30"><text:span text:style-name="T37"><text:s text:c="2"/></text:span><text:span text:style-name="T35">my.cnf</text:span><text:span text:style-name="T36">: </text:span><text:span text:style-name="T37">|</text:span></text:p>
          <text:p text:style-name="P30"><text:span text:style-name="T37"><text:s text:c="4"/></text:span><text:span text:style-name="T37">[mariadb]</text:span></text:p>
          <text:p text:style-name="P30"><text:span text:style-name="T37"><text:s text:c="4"/></text:span><text:span text:style-name="T37">innodb_buffer_pool_size=9600M</text:span></text:p>
          <text:p text:style-name="P30"><text:span text:style-name="T39">---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metadata</text:span><text:span text:style-name="T36">:</text:span></text:p>
          <text:p text:style-name="P30"><text:span text:style-name="T37"><text:s text:c="2"/></text:span><text:span text:style-name="T35">name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resources</text:span><text:span text:style-name="T36">:</text:span></text:p>
          <text:p text:style-name="P30"><text:span text:style-name="T37"><text:s text:c="4"/></text:span><text:span text:style-name="T35">requests</text:span><text:span text:style-name="T36">:</text:span></text:p>
          <text:p text:style-name="P30"><text:span text:style-name="T37"><text:s text:c="6"/></text:span><text:span text:style-name="T35">memory</text:span><text:span text:style-name="T36">: </text:span><text:span text:style-name="T38">12Gi</text:span></text:p>
          <text:p text:style-name="P30"><text:span text:style-name="T37"><text:s text:c="4"/></text:span><text:span text:style-name="T35">limits</text:span><text:span text:style-name="T36">:</text:span></text:p>
          <text:p text:style-name="P30"><text:span text:style-name="T37"><text:s text:c="6"/></text:span><text:span text:style-name="T35">memory</text:span><text:span text:style-name="T36">: </text:span><text:span text:style-name="T38">12Gi</text:span></text:p>
          <text:p text:style-name="P30"><text:span text:style-name="T37"><text:s text:c="2"/></text:span><text:span text:style-name="T35">myCnfConfigMapKeyRef</text:span><text:span text:style-name="T36">:</text:span></text:p>
          <text:p text:style-name="P30"><text:span text:style-name="T37"><text:s text:c="4"/></text:span><text:span text:style-name="T35">name</text:span><text:span text:style-name="T36">: </text:span><text:span text:style-name="T37">mariadb-config</text:span></text:p>
          <text:p text:style-name="P30"><text:span text:style-name="T37"><text:s text:c="4"/></text:span><text:span text:style-name="T35">key</text:span><text:span text:style-name="T36">: </text:span><text:span text:style-name="T37">my.cnf</text:span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7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his is a very common day-2 operation. Changing innodb_buffer_pool_size after resizing nodes, or tuning max_connections after a traffic spike — all done with a kubectl edit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7" draw:text-style-name="P8" draw:layer="layout" svg:width="2.285cm" svg:height="0.71cm" svg:x="1.143cm" svg:y="0.559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" draw:style-name="gr157" draw:text-style-name="P18" draw:layer="layout" svg:width="2.285cm" svg:height="0.71cm" svg:x="1.143cm" svg:y="0.559cm">
          <text:p text:style-name="P17"><text:span text:style-name="T29">DAY 2 · 6 /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8" draw:text-style-name="P5" draw:layer="layout" svg:width="11.683cm" svg:height="1.218cm" svg:x="1.143cm" svg:y="1.422cm">
          <text:p text:style-name="P4"><text:span text:style-name="T30">Mainten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9" draw:text-style-name="P5" draw:layer="layout" svg:width="11.683cm" svg:height="0.659cm" svg:x="1.143cm" svg:y="2.591cm">
          <text:p text:style-name="P4"><text:span text:style-name="T31">Safe operational windows with fine-grained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8" draw:layer="layout" svg:width="0.253cm" svg:height="0.253cm" svg:x="1.143cm" svg:y="3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60" draw:text-style-name="P5" draw:layer="layout" svg:width="11.175cm" svg:height="1.117cm" svg:x="1.6cm" svg:y="3.505cm">
          <text:p text:style-name="P4"><text:span text:style-name="T32">Suspend: </text:span><text:span text:style-name="T33">pause all operator reconciliation for fully manual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7" draw:text-style-name="P8" draw:layer="layout" svg:width="0.253cm" svg:height="0.253cm" svg:x="1.14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61" draw:text-style-name="P5" draw:layer="layout" svg:width="11.175cm" svg:height="1.117cm" svg:x="1.6cm" svg:y="4.826cm">
          <text:p text:style-name="P4"><text:span text:style-name="T32">Cordon: </text:span><text:span text:style-name="T33">remove pods from Service endpoints — blocks new conn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8" draw:layer="layout" svg:width="0.253cm" svg:height="0.253cm" svg:x="1.143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62" draw:text-style-name="P5" draw:layer="layout" svg:width="11.175cm" svg:height="1.117cm" svg:x="1.6cm" svg:y="6.147cm">
          <text:p text:style-name="P4"><text:span text:style-name="T32">Drain: </text:span><text:span text:style-name="T33">gracefully terminate long-running queries after a grace peri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8" draw:layer="layout" svg:width="0.253cm" svg:height="0.253cm" svg:x="1.143cm" svg:y="7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63" draw:text-style-name="P5" draw:layer="layout" svg:width="11.175cm" svg:height="1.117cm" svg:x="1.6cm" svg:y="7.468cm">
          <text:p text:style-name="P4"><text:span text:style-name="T32">ReadOnly: </text:span><text:span text:style-name="T33">prevent writes — ideal before a cluster switch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7" draw:text-style-name="P8" draw:layer="layout" svg:width="0.253cm" svg:height="0.253cm" svg:x="1.143cm" svg:y="8.9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64" draw:text-style-name="P5" draw:layer="layout" svg:width="11.175cm" svg:height="1.117cm" svg:x="1.6cm" svg:y="8.788cm">
          <text:p text:style-name="P4"><text:span text:style-name="T33">Combine cordon + drain + readOnly for a safe zero-data-loss maintenanc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1" draw:text-style-name="P26" draw:layer="layout" svg:width="11.302cm" svg:height="13.156cm" svg:x="13.462cm" svg:y="0.559cm">
          <text:p/>
          <draw:enhanced-geometry draw:mirror-horizontal="false" draw:mirror-vertical="false" svg:viewBox="0 0 0 0" draw:text-areas="?f5 ?f5 ?f6 ?f7" draw:type="ooxml-roundRect" draw:modifiers="26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hape 16" draw:style-name="gr72" draw:text-style-name="P27" draw:layer="layout" svg:width="0.304cm" svg:height="0.304cm" svg:x="13.97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" draw:style-name="gr73" draw:text-style-name="P28" draw:layer="layout" svg:width="0.304cm" svg:height="0.304cm" svg:x="14.605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" draw:style-name="gr74" draw:text-style-name="P29" draw:layer="layout" svg:width="0.304cm" svg:height="0.304cm" svg:x="15.24cm" svg:y="0.9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75" draw:text-style-name="P31" draw:layer="layout" svg:width="10.87cm" svg:height="11.886cm" svg:x="13.665cm" svg:y="1.524cm">
          <text:p text:style-name="P30"><text:span text:style-name="T34"># Suspend: pause all operator reconciliation.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suspend</text:span><text:span text:style-name="T36">: </text:span><text:span text:style-name="T40">true</text:span></text:p>
          <text:p text:style-name="P30"><text:span text:style-name="T39">---</text:span></text:p>
          <text:p text:style-name="P30"><text:span text:style-name="T34"># Maintenance mode: fine-grained control</text:span></text:p>
          <text:p text:style-name="P30"><text:span text:style-name="T34"># over traffic during planned windows.</text:span></text:p>
          <text:p text:style-name="P30"><text:span text:style-name="T34"># Ideal before a multi-cluster switchover.</text:span></text:p>
          <text:p text:style-name="P30"><text:span text:style-name="T35">apiVersion</text:span><text:span text:style-name="T36">: </text:span><text:span text:style-name="T37">k8s.mariadb.com/v1alpha1</text:span></text:p>
          <text:p text:style-name="P30"><text:span text:style-name="T35">kind</text:span><text:span text:style-name="T36">: </text:span><text:span text:style-name="T37">MariaDB</text:span></text:p>
          <text:p text:style-name="P30"><text:span text:style-name="T35">spec</text:span><text:span text:style-name="T36">:</text:span></text:p>
          <text:p text:style-name="P30"><text:span text:style-name="T37"><text:s text:c="2"/></text:span><text:span text:style-name="T35">maintenance</text:span><text:span text:style-name="T36">:</text:span></text:p>
          <text:p text:style-name="P30"><text:span text:style-name="T34"><text:s text:c="4"/></text:span><text:span text:style-name="T34"># Block new connections at Service level.</text:span></text:p>
          <text:p text:style-name="P30"><text:span text:style-name="T37"><text:s text:c="4"/></text:span><text:span text:style-name="T35">enabled</text:span><text:span text:style-name="T36">: </text:span><text:span text:style-name="T40">true</text:span></text:p>
          <text:p text:style-name="P30"><text:span text:style-name="T37"><text:s text:c="4"/></text:span><text:span text:style-name="T35">cordon</text:span><text:span text:style-name="T36">: </text:span><text:span text:style-name="T40">true</text:span></text:p>
          <text:p text:style-name="P30"><text:span text:style-name="T34"><text:s text:c="4"/></text:span><text:span text:style-name="T34"># Gracefully terminate long-running queries.</text:span></text:p>
          <text:p text:style-name="P30"><text:span text:style-name="T37"><text:s text:c="4"/></text:span><text:span text:style-name="T35">drainConnections</text:span><text:span text:style-name="T36">: </text:span><text:span text:style-name="T40">true</text:span></text:p>
          <text:p text:style-name="P30"><text:span text:style-name="T37"><text:s text:c="4"/></text:span><text:span text:style-name="T35">drainGracePeriodSeconds</text:span><text:span text:style-name="T36">: </text:span><text:span text:style-name="T38">30</text:span></text:p>
          <text:p text:style-name="P30"><text:span text:style-name="T34"><text:s text:c="4"/></text:span><text:span text:style-name="T34"># Prevent accidental writes.</text:span></text:p>
          <text:p text:style-name="P30"><text:span text:style-name="T37"><text:s text:c="4"/></text:span><text:span text:style-name="T35">readOnly</text:span><text:span text:style-name="T36">: </text:span><text:span text:style-name="T40">true</text:span></text:p>
          <text:p text:style-name="P4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8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e use this before a multi-cluster switchover: cordon → drain → readOnly → wait for replica sync → promote replica → disable maintenance on old primary. Fully declarative, zero data loss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DEFAULT">
        <draw:custom-shape draw:name="Shape 0" draw:style-name="gr58" draw:text-style-name="P24" draw:layer="layout" svg:width="15.239cm" svg:height="15.239cm" svg:x="16.51cm" svg:y="-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34" draw:text-style-name="P22" draw:layer="layout" svg:width="10.159cm" svg:height="10.159cm" svg:x="-3.81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27" draw:text-style-name="P8" draw:layer="layout" svg:width="3.301cm" svg:height="0.964cm" svg:x="1.397cm" svg:y="4.064cm">
          <text:p/>
          <draw:enhanced-geometry draw:mirror-horizontal="false" draw:mirror-vertical="false" svg:viewBox="0 0 0 0" draw:text-areas="?f5 ?f5 ?f6 ?f7" draw:type="ooxml-roundRect" draw:modifiers="210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165" draw:text-style-name="P18" draw:layer="layout" svg:width="3.301cm" svg:height="0.964cm" svg:x="1.397cm" svg:y="4.064cm">
          <text:p text:style-name="P17"><text:span text:style-name="T26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6" draw:text-style-name="P5" draw:layer="layout" svg:width="19.049cm" svg:height="1.828cm" svg:x="1.397cm" svg:y="5.334cm">
          <text:p text:style-name="P4"><text:span text:style-name="T27">Multi-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7" draw:text-style-name="P5" draw:layer="layout" svg:width="19.049cm" svg:height="0.888cm" svg:x="1.397cm" svg:y="7.366cm">
          <text:p text:style-name="P4"><text:span text:style-name="T28">Cross-cluster replication · Multi-region HA · Blue-green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62" draw:text-style-name="P3" draw:layer="layout" svg:x1="1.397cm" svg:y1="8.509cm" svg:x2="12.827cm" svg:y2="8.51cm">
          <text:p/>
        </draw:line>
        <presentation:notes draw:style-name="dp2">
          <draw:page-thumbnail draw:name="Slide Image Placeholder 1" draw:style-name="gr11" draw:layer="layout" svg:width="15.239cm" svg:height="8.572cm" svg:x="1.905cm" svg:y="3.175cm" draw:page-number="19" presentation:class="page"/>
          <draw:frame draw:name="Notes Placeholder 2" presentation:style-name="pr5" draw:text-style-name="P2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DEFAULT">
        <draw:custom-shape draw:name="Shape 0" draw:style-name="gr37" draw:text-style-name="P23" draw:layer="layout" svg:width="10.159cm" svg:height="10.159cm" svg:x="19.812cm" svg:y="-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" draw:style-name="gr168" draw:text-style-name="P5" draw:layer="layout" svg:width="24.129cm" svg:height="1.269cm" svg:x="1.143cm" svg:y="0.508cm">
          <text:p text:style-name="P4"><text:span text:style-name="T42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9" draw:text-style-name="P5" draw:layer="layout" svg:width="24.129cm" svg:height="0.71cm" svg:x="1.143cm" svg:y="1.829cm">
          <text:p text:style-name="P4"><text:span text:style-name="T31">Cross-region deployment using the multi-cluster 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0" draw:text-style-name="P32" draw:layer="layout" svg:width="25.4cm" svg:height="11.284cm" svg:x="0cm" svg:y="3.004cm">
          <draw:image xlink:href="Pictures/1000000100000C29000005673BA44EE4B3682AF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20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Walk through the diagram: eu-south is the primary Galera cluster. eu-central replicates from it asynchronously. Both share an S3 bucket for physical backups and binlogs. A load balancer sits in front — updated during switchover. The operator on each side manages the full lifecycle independently.</text:span></text:p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DEFAULT">
        <draw:custom-shape draw:name="Shape 3" draw:style-name="gr1" draw:text-style-name="P1" draw:layer="layout" svg:width="17.779cm" svg:height="17.779cm" svg:x="15.748cm" svg:y="-5.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" draw:style-name="gr2" draw:text-style-name="P2" draw:layer="layout" svg:width="13.969cm" svg:height="13.969cm" svg:x="-6.35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gr171" draw:text-style-name="P33" draw:layer="layout" svg:width="7.619cm" svg:height="7.619cm" svg:x="8.89cm" svg:y="12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5" draw:style-name="gr9" draw:text-style-name="P3" draw:layer="layout" svg:width="2.793cm" svg:height="1.802cm" svg:x="1.397cm" svg:y="0.762cm">
          <draw:image xlink:href="Pictures/1000000100000190000001044860CFBFF0406581.png" xlink:type="simple" xlink:show="embed" xlink:actuate="onLoad" draw:mime-type="image/png">
            <text:p/>
          </draw:image>
          <svg:desc>preencoded.png</svg:desc>
        </draw:frame>
        <draw:custom-shape draw:name="Text 24" draw:style-name="gr172" draw:text-style-name="P5" draw:layer="layout" svg:width="16.509cm" svg:height="2.031cm" svg:x="1.143cm" svg:y="2.921cm">
          <text:p text:style-name="P4"><text:span text:style-name="T43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73" draw:text-style-name="P5" draw:layer="layout" svg:width="16.509cm" svg:height="0.888cm" svg:x="1.143cm" svg:y="4.953cm">
          <text:p text:style-name="P4"><text:span text:style-name="T44">Run and Operate MariaDB in a Cloud Native 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1" draw:style-name="gr62" draw:text-style-name="P3" draw:layer="layout" svg:x1="1.143cm" svg:y1="6.096cm" svg:x2="15.113cm" svg:y2="6.097cm">
          <text:p/>
        </draw:line>
        <draw:custom-shape draw:name="Text 26" draw:style-name="gr174" draw:text-style-name="P5" draw:layer="layout" svg:width="16.509cm" svg:height="0.761cm" svg:x="1.143cm" svg:y="6.604cm">
          <text:p text:style-name="P4"><text:span text:style-name="T32">Useful l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75" draw:text-style-name="P5" draw:layer="layout" svg:width="5.587cm" svg:height="0.913cm" svg:x="1.143cm" svg:y="7.62cm">
          <text:p text:style-name="P4"><text:span text:style-name="T17">📚 <text:s/></text:span><text:span text:style-name="T17">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76" draw:text-style-name="P5" draw:layer="layout" svg:width="11.429cm" svg:height="0.812cm" svg:x="6.858cm" svg:y="7.671cm">
          <text:p text:style-name="P4"><text:span text:style-name="T45">github.com/mariadb-operator/mariadb-operator/blob/demos-multi-cluster/docs/README.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77" draw:text-style-name="P5" draw:layer="layout" svg:width="5.587cm" svg:height="0.913cm" svg:x="1.143cm" svg:y="8.839cm">
          <text:p text:style-name="P4"><text:span text:style-name="T17">🛠️ <text:s/></text:span><text:span text:style-name="T17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78" draw:text-style-name="P5" draw:layer="layout" svg:width="11.429cm" svg:height="0.812cm" svg:x="6.858cm" svg:y="8.89cm">
          <text:p text:style-name="P4"><text:span text:style-name="T45">github.com/mariadb-operator/mariadb-operator/tree/demos-multi-cluster/demos/multi-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79" draw:text-style-name="P5" draw:layer="layout" svg:width="5.587cm" svg:height="0.913cm" svg:x="1.143cm" svg:y="10.058cm">
          <text:p text:style-name="P4"><text:span text:style-name="T17">🦭 <text:s/></text:span><text:span text:style-name="T17">GitHub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80" draw:text-style-name="P5" draw:layer="layout" svg:width="11.429cm" svg:height="0.812cm" svg:x="6.858cm" svg:y="10.109cm">
          <text:p text:style-name="P4"><text:span text:style-name="T45">github.com/mariadb-operator/mariadb-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81" draw:text-style-name="P5" draw:layer="layout" svg:width="15.239cm" svg:height="0.761cm" svg:x="1.143cm" svg:y="12.573cm">
          <text:p text:style-name="P4"><text:span text:style-name="T22">Martin Montes <text:s/>· <text:s/>Lead Engineer, MariaDB Corp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82" draw:text-style-name="P19" draw:layer="layout" svg:width="5.333cm" svg:height="5.333cm" svg:x="18.923cm" svg:y="2.794cm">
          <text:p/>
          <draw:enhanced-geometry draw:mirror-horizontal="false" draw:mirror-vertical="false" svg:viewBox="0 0 0 0" draw:text-areas="?f5 ?f5 ?f6 ?f7" draw:type="ooxml-roundRect" draw:modifiers="476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6" draw:style-name="gr9" draw:text-style-name="P3" draw:layer="layout" svg:width="4.825cm" svg:height="4.825cm" svg:x="19.177cm" svg:y="3.048cm">
          <draw:image xlink:href="Pictures/100000010000019000000190603268EAEA4351F2.png" xlink:type="simple" xlink:show="embed" xlink:actuate="onLoad" draw:mime-type="image/png">
            <text:p/>
          </draw:image>
          <svg:desc>preencoded.png</svg:desc>
        </draw:frame>
        <draw:custom-shape draw:name="Text 34" draw:style-name="gr183" draw:text-style-name="P18" draw:layer="layout" svg:width="6.603cm" svg:height="0.71cm" svg:x="18.288cm" svg:y="8.331cm">
          <text:p text:style-name="P17"><text:span text:style-name="T46">Scan to open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2" draw:style-name="gr11" draw:layer="layout" svg:width="15.239cm" svg:height="8.572cm" svg:x="1.905cm" svg:y="3.175cm" draw:page-number="21" presentation:class="page"/>
          <draw:frame draw:name="Notes Placeholder 1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5">Thank the audience. Point to the QR code for the repo. Mention the demo manifests are available under the demos/multi-cluster directory on the demos-multi-cluster branch.</text:span></text:p>
            </draw:text-box>
          </draw:frame>
          <draw:frame draw:name="Slide Number Placeholder 1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variable"/>
    <style:font-face style:name="Cambria2" svg:font-family="Cambria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1F4000001F4311B7FC6D13F355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un and Operate MariaDB in a Cloud Native Way Using the MariaDB Operator</dc:title>
    <dc:subject>PptxGenJS Presentation</dc:subject>
    <meta:initial-creator>Martin Montes</meta:initial-creator>
    <meta:editing-cycles>3</meta:editing-cycles>
    <meta:creation-date>2026-06-19T14:27:48</meta:creation-date>
    <dc:date>2026-06-19T16:57:02.549020833</dc:date>
    <meta:editing-duration>PT7M59S</meta:editing-duration>
    <meta:generator>LibreOffice/7.3.7.2$Linux_X86_64 LibreOffice_project/30$Build-2</meta:generator>
    <meta:document-statistic meta:object-count="433"/>
    <meta:user-defined meta:name="AppVersion">16.0000</meta:user-defined>
    <meta:user-defined meta:name="Company">PptxGenJS</meta:user-defined>
    <meta:user-defined meta:name="Notes" meta:value-type="float">21</meta:user-defined>
    <meta:user-defined meta:name="PresentationFormat">On-screen Show (16:9)</meta:user-defined>
    <meta:user-defined meta:name="Slides" meta:value-type="float">2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26cm" draw:fill-color="#162032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loext:external-data="ppt/embeddings/Microsoft_Excel_Worksheet1.xlsx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axis-label-position="outside-start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5" style:family="chart">
      <style:graphic-properties svg:stroke-width="0.018cm" svg:stroke-color="#1e3a4a"/>
    </style:style>
    <style:style style:name="ch6" style:family="chart" style:data-style-name="N3">
      <style:chart-properties chart:symbol-type="named-symbol" chart:symbol-name="circle" chart:symbol-width="0.212cm" chart:symbol-height="0.212cm" chart:link-data-style-to-source="false" chart:label-position="right" loext:custom-leader-lines="false">
        <chart:label-separator>
          <text:p>; </text:p>
        </chart:label-separator>
      </style:chart-properties>
      <style:graphic-properties svg:stroke-width="0.088cm" svg:stroke-color="#99f6e4" draw:fill-color="#99f6e4" fo:wrap-option="wrap"/>
      <style:text-properties fo:color="#000000" style:text-position="0% 100%" fo:font-family="Arial" fo:font-size="12pt" style:font-size-asian="12pt" style:font-size-complex="12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986cm" svg:height="3.937cm" xlink:href="." xlink:type="simple" chart:class="chart:line" chart:style-name="ch1">
        <chart:plot-area chart:style-name="ch2" chart:data-source-has-labels="both" svg:x="0.299cm" svg:y="0.078cm" svg:width="14.388cm" svg:height="3.781cm">
          <chart:coordinate-region svg:x="1.503cm" svg:y="0.304cm" svg:width="13.184cm" svg:height="2.404cm"/>
          <chart:axis chart:dimension="x" chart:name="primary-x" chart:style-name="ch3" chartooo:axis-type="auto">
            <chartooo:date-scale/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s</text:p>
              </table:table-cell>
            </table:table-row>
          </table:table-header-rows>
          <table:table-rows>
            <table:table-row>
              <table:table-cell office:value-type="string">
                <text:p>20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Q1 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Q2 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Q3 2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Q4 2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Q1 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Q2 2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Q3 2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Q4 2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Q1 2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Q2 2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Q3 2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Q4 2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Jun 26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